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6694in" table:align="left"/>
    </style:style>
    <style:style style:name="Table1.A" style:family="table-column">
      <style:table-column-properties style:column-width="2.8347in"/>
    </style:style>
    <style:style style:name="Table1.B" style:family="table-column">
      <style:table-column-properties style:column-width="1.5in"/>
    </style:style>
    <style:style style:name="Table1.C" style:family="table-column">
      <style:table-column-properties style:column-width="1.3347in"/>
    </style:style>
    <style:style style:name="Table1.A1" style:family="table-cell">
      <style:table-cell-properties style:vertical-align="middle" fo:padding="0.0194in" fo:border="0.05pt solid #000000"/>
    </style:style>
    <style:style style:name="Table2" style:family="table">
      <style:table-properties style:width="6.2556in" table:align="left"/>
    </style:style>
    <style:style style:name="Table2.A" style:family="table-column">
      <style:table-column-properties style:column-width="0.6188in"/>
    </style:style>
    <style:style style:name="Table2.B" style:family="table-column">
      <style:table-column-properties style:column-width="2.8549in"/>
    </style:style>
    <style:style style:name="Table2.C" style:family="table-column">
      <style:table-column-properties style:column-width="1.3035in"/>
    </style:style>
    <style:style style:name="Table2.D" style:family="table-column">
      <style:table-column-properties style:column-width="1.4785in"/>
    </style:style>
    <style:style style:name="Table2.A1" style:family="table-cell">
      <style:table-cell-properties style:vertical-align="middle" fo:padding="0.0194in" fo:border="0.05pt solid #000000"/>
    </style:style>
    <style:style style:name="Table3" style:family="table">
      <style:table-properties style:width="5.0958in" table:align="left"/>
    </style:style>
    <style:style style:name="Table3.A" style:family="table-column">
      <style:table-column-properties style:column-width="1.5514in"/>
    </style:style>
    <style:style style:name="Table3.B" style:family="table-column">
      <style:table-column-properties style:column-width="1.209in"/>
    </style:style>
    <style:style style:name="Table3.C" style:family="table-column">
      <style:table-column-properties style:column-width="2.3354in"/>
    </style:style>
    <style:style style:name="Table3.A1" style:family="table-cell">
      <style:table-cell-properties style:vertical-align="middle" fo:padding="0.0194in" fo:border="0.05pt solid #000000"/>
    </style:style>
    <style:style style:name="Table4" style:family="table">
      <style:table-properties style:width="6.6931in" table:align="left"/>
    </style:style>
    <style:style style:name="Table4.A" style:family="table-column">
      <style:table-column-properties style:column-width="0.5049in"/>
    </style:style>
    <style:style style:name="Table4.B" style:family="table-column">
      <style:table-column-properties style:column-width="1.4167in"/>
    </style:style>
    <style:style style:name="Table4.C" style:family="table-column">
      <style:table-column-properties style:column-width="0.9771in"/>
    </style:style>
    <style:style style:name="Table4.D" style:family="table-column">
      <style:table-column-properties style:column-width="0.9063in"/>
    </style:style>
    <style:style style:name="Table4.E" style:family="table-column">
      <style:table-column-properties style:column-width="0.7285in"/>
    </style:style>
    <style:style style:name="Table4.F" style:family="table-column">
      <style:table-column-properties style:column-width="2.1597in"/>
    </style:style>
    <style:style style:name="Table4.A1" style:family="table-cell">
      <style:table-cell-properties style:vertical-align="middle" fo:padding="0.0194in" fo:border="0.05pt solid #000000"/>
    </style:style>
    <style:style style:name="P1" style:family="paragraph" style:parent-style-name="Heading_20_1">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Heading_20_1">
      <style:paragraph-properties fo:margin-left="0in" fo:margin-right="0in" fo:margin-top="0in" fo:margin-bottom="0.0972in" style:contextual-spacing="false" fo:line-height="114%" fo:text-indent="0in" style:auto-text-indent="false"/>
      <style:text-properties style:font-name="Google Sans" officeooo:paragraph-rsid="000fba6e"/>
    </style:style>
    <style:style style:name="P3" style:family="paragraph" style:parent-style-name="Heading_20_1">
      <style:paragraph-properties fo:margin-left="0in" fo:margin-right="0in" fo:margin-top="0in" fo:margin-bottom="0.0972in" style:contextual-spacing="false" fo:line-height="114%" fo:text-indent="0in" style:auto-text-indent="false" fo:padding="0in" fo:border="none"/>
    </style:style>
    <style:style style:name="P4" style:family="paragraph" style:parent-style-name="Heading_20_1">
      <style:paragraph-properties fo:margin-left="0in" fo:margin-right="0in" fo:margin-top="0in" fo:margin-bottom="0.0835in" style:contextual-spacing="false" fo:line-height="114%" fo:text-indent="0in" style:auto-text-indent="false"/>
    </style:style>
    <style:style style:name="P5" style:family="paragraph" style:parent-style-name="Heading_20_2">
      <style:paragraph-properties fo:margin-left="0in" fo:margin-right="0in" fo:margin-top="0in" fo:margin-bottom="0.0972in" style:contextual-spacing="false" fo:line-height="114%" fo:text-indent="0in" style:auto-text-indent="false"/>
      <style:text-properties style:font-name="Google Sans"/>
    </style:style>
    <style:style style:name="P6" style:family="paragraph" style:parent-style-name="Heading_20_2">
      <style:paragraph-properties fo:margin-left="0in" fo:margin-right="0in" fo:margin-top="0in" fo:margin-bottom="0.0972in" style:contextual-spacing="false" fo:line-height="114%" fo:text-indent="0in" style:auto-text-indent="false"/>
      <style:text-properties style:font-name="Google Sans" officeooo:paragraph-rsid="000fba6e"/>
    </style:style>
    <style:style style:name="P7"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8"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officeooo:paragraph-rsid="000fba6e"/>
    </style:style>
    <style:style style:name="P9" style:family="paragraph" style:parent-style-name="Heading_20_3">
      <style:paragraph-properties fo:margin-left="0in" fo:margin-right="0in" fo:margin-top="0in" fo:margin-bottom="0.0835in" style:contextual-spacing="false" fo:line-height="114%" fo:text-indent="0in" style:auto-text-indent="false"/>
    </style:style>
    <style:style style:name="P10" style:family="paragraph" style:parent-style-name="Heading_20_4">
      <style:paragraph-properties fo:margin-left="0in" fo:margin-right="0in" fo:margin-top="0in" fo:margin-bottom="0.0972in" style:contextual-spacing="false" fo:line-height="114%" fo:text-indent="0in" style:auto-text-indent="false"/>
      <style:text-properties style:font-name="Google Sans"/>
    </style:style>
    <style:style style:name="P11" style:family="paragraph" style:parent-style-name="Heading_20_4">
      <style:paragraph-properties fo:margin-left="0in" fo:margin-right="0in" fo:margin-top="0in" fo:margin-bottom="0.0835in" style:contextual-spacing="false" fo:line-height="114%" fo:text-indent="0in" style:auto-text-indent="false"/>
    </style:style>
    <style:style style:name="P12" style:family="paragraph" style:parent-style-name="Horizontal_20_Line">
      <style:text-properties officeooo:paragraph-rsid="000fba6e"/>
    </style:style>
    <style:style style:name="P13" style:family="paragraph" style:parent-style-name="Preformatted_20_Text">
      <style:paragraph-properties fo:margin-left="0in" fo:margin-right="0in" fo:margin-top="0in" fo:margin-bottom="0in" style:contextual-spacing="false" fo:line-height="114%" fo:text-indent="0in" style:auto-text-indent="false"/>
      <style:text-properties officeooo:paragraph-rsid="000fba6e"/>
    </style:style>
    <style:style style:name="P14" style:family="paragraph" style:parent-style-name="Preformatted_20_Text">
      <style:paragraph-properties fo:margin-top="0in" fo:margin-bottom="0in" style:contextual-spacing="false" fo:line-height="114%"/>
      <style:text-properties officeooo:paragraph-rsid="000fba6e"/>
    </style:style>
    <style:style style:name="P15" style:family="paragraph" style:parent-style-name="Standard">
      <style:paragraph-properties fo:margin-left="0in" fo:margin-right="0in" fo:margin-top="0in" fo:margin-bottom="0.0972in" style:contextual-spacing="false" fo:line-height="114%" fo:text-indent="0in" style:auto-text-indent="false" fo:padding="0in" fo:border="none"/>
      <style:text-properties officeooo:paragraph-rsid="000fba6e"/>
    </style:style>
    <style:style style:name="P16" style:family="paragraph" style:parent-style-name="Standard">
      <style:text-properties officeooo:paragraph-rsid="000fba6e"/>
    </style:style>
    <style:style style:name="P17" style:family="paragraph" style:parent-style-name="Table_20_Contents">
      <style:paragraph-properties fo:margin-left="0in" fo:margin-right="0in" fo:margin-top="0in" fo:margin-bottom="0in" style:contextual-spacing="false" fo:line-height="114%" fo:text-indent="0in" style:auto-text-indent="false"/>
      <style:text-properties officeooo:paragraph-rsid="000fba6e"/>
    </style:style>
    <style:style style:name="P18"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officeooo:paragraph-rsid="000fba6e"/>
    </style:style>
    <style:style style:name="P19"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officeooo:paragraph-rsid="000fba6e"/>
    </style:style>
    <style:style style:name="P20"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21"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22"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officeooo:paragraph-rsid="000fba6e"/>
    </style:style>
    <style:style style:name="P2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4"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5"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26"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8"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9"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0" style:family="paragraph" style:parent-style-name="Text_20_body" style:list-style-name="L1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1" style:family="paragraph" style:parent-style-name="Text_20_body" style:list-style-name="L1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2" style:family="paragraph" style:parent-style-name="Text_20_body" style:list-style-name="L1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3" style:family="paragraph" style:parent-style-name="Text_20_body" style:list-style-name="L20">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4" style:family="paragraph" style:parent-style-name="Text_20_body" style:list-style-name="L2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5" style:family="paragraph" style:parent-style-name="Text_20_body" style:list-style-name="L2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6" style:family="paragraph" style:parent-style-name="Text_20_body" style:list-style-name="L3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7" style:family="paragraph" style:parent-style-name="Text_20_body" style:list-style-name="L3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8" style:family="paragraph" style:parent-style-name="Text_20_body" style:list-style-name="L3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9" style:family="paragraph" style:parent-style-name="Text_20_body" style:list-style-name="L39">
      <style:paragraph-properties fo:margin-left="0in" fo:margin-right="0in" fo:margin-top="0in" fo:margin-bottom="0.0972in" style:contextual-spacing="false" fo:line-height="114%" fo:text-indent="0in" style:auto-text-indent="false" fo:padding="0in" fo:border="none"/>
      <style:text-properties style:font-name="Google Sans Text" officeooo:paragraph-rsid="000fba6e"/>
    </style:style>
    <style:style style:name="P40" style:family="paragraph" style:parent-style-name="Text_20_body" style:list-style-name="L41">
      <style:paragraph-properties fo:margin-left="0in" fo:margin-right="0in" fo:margin-top="0in" fo:margin-bottom="0.0972in" style:contextual-spacing="false" fo:line-height="114%" fo:text-indent="0in" style:auto-text-indent="false" fo:padding="0in" fo:border="none"/>
      <style:text-properties style:font-name="Google Sans Text" officeooo:paragraph-rsid="000fba6e"/>
    </style:style>
    <style:style style:name="P41"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officeooo:paragraph-rsid="000fba6e"/>
    </style:style>
    <style:style style:name="P42"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tyle="italic"/>
    </style:style>
    <style:style style:name="P43"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tyle="italic" officeooo:paragraph-rsid="000fba6e"/>
    </style:style>
    <style:style style:name="P44" style:family="paragraph" style:parent-style-name="Text_20_body">
      <style:paragraph-properties fo:margin-left="0in" fo:margin-right="0in" fo:margin-top="0in" fo:margin-bottom="0.0972in" style:contextual-spacing="false" fo:line-height="114%" fo:text-indent="0in" style:auto-text-indent="false"/>
    </style:style>
    <style:style style:name="P45" style:family="paragraph" style:parent-style-name="Text_20_body">
      <style:paragraph-properties fo:margin-left="0in" fo:margin-right="0in" fo:margin-top="0in" fo:margin-bottom="0.0972in" style:contextual-spacing="false" fo:line-height="114%" fo:text-indent="0in" style:auto-text-indent="false" fo:padding="0in" fo:border="none"/>
    </style:style>
    <style:style style:name="P46"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style>
    <style:style style:name="P47"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style>
    <style:style style:name="P48"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style>
    <style:style style:name="P49"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style>
    <style:style style:name="P50"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style>
    <style:style style:name="P51"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style>
    <style:style style:name="P52"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style>
    <style:style style:name="P53"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style>
    <style:style style:name="P54"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style>
    <style:style style:name="P55" style:family="paragraph" style:parent-style-name="Text_20_body" style:list-style-name="L12">
      <style:paragraph-properties fo:margin-left="0in" fo:margin-right="0in" fo:margin-top="0in" fo:margin-bottom="0.0972in" style:contextual-spacing="false" fo:line-height="114%" fo:text-indent="0in" style:auto-text-indent="false" fo:padding="0in" fo:border="none"/>
    </style:style>
    <style:style style:name="P56" style:family="paragraph" style:parent-style-name="Text_20_body" style:list-style-name="L13">
      <style:paragraph-properties fo:margin-left="0in" fo:margin-right="0in" fo:margin-top="0in" fo:margin-bottom="0.0972in" style:contextual-spacing="false" fo:line-height="114%" fo:text-indent="0in" style:auto-text-indent="false" fo:padding="0in" fo:border="none"/>
    </style:style>
    <style:style style:name="P57" style:family="paragraph" style:parent-style-name="Text_20_body" style:list-style-name="L14">
      <style:paragraph-properties fo:margin-left="0in" fo:margin-right="0in" fo:margin-top="0in" fo:margin-bottom="0.0972in" style:contextual-spacing="false" fo:line-height="114%" fo:text-indent="0in" style:auto-text-indent="false" fo:padding="0in" fo:border="none"/>
    </style:style>
    <style:style style:name="P58"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style>
    <style:style style:name="P59" style:family="paragraph" style:parent-style-name="Text_20_body" style:list-style-name="L16">
      <style:paragraph-properties fo:margin-left="0in" fo:margin-right="0in" fo:margin-top="0in" fo:margin-bottom="0.0972in" style:contextual-spacing="false" fo:line-height="114%" fo:text-indent="0in" style:auto-text-indent="false" fo:padding="0in" fo:border="none"/>
    </style:style>
    <style:style style:name="P60" style:family="paragraph" style:parent-style-name="Text_20_body" style:list-style-name="L17">
      <style:paragraph-properties fo:margin-left="0in" fo:margin-right="0in" fo:margin-top="0in" fo:margin-bottom="0.0972in" style:contextual-spacing="false" fo:line-height="114%" fo:text-indent="0in" style:auto-text-indent="false" fo:padding="0in" fo:border="none"/>
    </style:style>
    <style:style style:name="P61" style:family="paragraph" style:parent-style-name="Text_20_body" style:list-style-name="L18">
      <style:paragraph-properties fo:margin-left="0in" fo:margin-right="0in" fo:margin-top="0in" fo:margin-bottom="0.0972in" style:contextual-spacing="false" fo:line-height="114%" fo:text-indent="0in" style:auto-text-indent="false" fo:padding="0in" fo:border="none"/>
    </style:style>
    <style:style style:name="P62" style:family="paragraph" style:parent-style-name="Text_20_body" style:list-style-name="L19">
      <style:paragraph-properties fo:margin-left="0in" fo:margin-right="0in" fo:margin-top="0in" fo:margin-bottom="0.0972in" style:contextual-spacing="false" fo:line-height="114%" fo:text-indent="0in" style:auto-text-indent="false" fo:padding="0in" fo:border="none"/>
    </style:style>
    <style:style style:name="P63" style:family="paragraph" style:parent-style-name="Text_20_body" style:list-style-name="L27">
      <style:paragraph-properties fo:margin-left="0in" fo:margin-right="0in" fo:margin-top="0in" fo:margin-bottom="0.0972in" style:contextual-spacing="false" fo:line-height="114%" fo:text-indent="0in" style:auto-text-indent="false" fo:padding="0in" fo:border="none"/>
    </style:style>
    <style:style style:name="P64" style:family="paragraph" style:parent-style-name="Text_20_body" style:list-style-name="L28">
      <style:paragraph-properties fo:margin-left="0in" fo:margin-right="0in" fo:margin-top="0in" fo:margin-bottom="0.0972in" style:contextual-spacing="false" fo:line-height="114%" fo:text-indent="0in" style:auto-text-indent="false" fo:padding="0in" fo:border="none"/>
    </style:style>
    <style:style style:name="P65" style:family="paragraph" style:parent-style-name="Text_20_body" style:list-style-name="L29">
      <style:paragraph-properties fo:margin-left="0in" fo:margin-right="0in" fo:margin-top="0in" fo:margin-bottom="0.0972in" style:contextual-spacing="false" fo:line-height="114%" fo:text-indent="0in" style:auto-text-indent="false" fo:padding="0in" fo:border="none"/>
    </style:style>
    <style:style style:name="P66" style:family="paragraph" style:parent-style-name="Text_20_body" style:list-style-name="L30">
      <style:paragraph-properties fo:margin-left="0in" fo:margin-right="0in" fo:margin-top="0in" fo:margin-bottom="0.0972in" style:contextual-spacing="false" fo:line-height="114%" fo:text-indent="0in" style:auto-text-indent="false" fo:padding="0in" fo:border="none"/>
    </style:style>
    <style:style style:name="P67" style:family="paragraph" style:parent-style-name="Text_20_body" style:list-style-name="L31">
      <style:paragraph-properties fo:margin-left="0in" fo:margin-right="0in" fo:margin-top="0in" fo:margin-bottom="0.0972in" style:contextual-spacing="false" fo:line-height="114%" fo:text-indent="0in" style:auto-text-indent="false" fo:padding="0in" fo:border="none"/>
    </style:style>
    <style:style style:name="P68" style:family="paragraph" style:parent-style-name="Text_20_body" style:list-style-name="L32">
      <style:paragraph-properties fo:margin-left="0in" fo:margin-right="0in" fo:margin-top="0in" fo:margin-bottom="0.0972in" style:contextual-spacing="false" fo:line-height="114%" fo:text-indent="0in" style:auto-text-indent="false" fo:padding="0in" fo:border="none"/>
    </style:style>
    <style:style style:name="P69" style:family="paragraph" style:parent-style-name="Text_20_body" style:list-style-name="L33">
      <style:paragraph-properties fo:margin-left="0in" fo:margin-right="0in" fo:margin-top="0in" fo:margin-bottom="0.0972in" style:contextual-spacing="false" fo:line-height="114%" fo:text-indent="0in" style:auto-text-indent="false" fo:padding="0in" fo:border="none"/>
    </style:style>
    <style:style style:name="P70" style:family="paragraph" style:parent-style-name="Text_20_body" style:list-style-name="L34">
      <style:paragraph-properties fo:margin-left="0in" fo:margin-right="0in" fo:margin-top="0in" fo:margin-bottom="0.0972in" style:contextual-spacing="false" fo:line-height="114%" fo:text-indent="0in" style:auto-text-indent="false" fo:padding="0in" fo:border="none"/>
    </style:style>
    <style:style style:name="P71" style:family="paragraph" style:parent-style-name="Text_20_body" style:list-style-name="L35">
      <style:paragraph-properties fo:margin-left="0in" fo:margin-right="0in" fo:margin-top="0in" fo:margin-bottom="0.0972in" style:contextual-spacing="false" fo:line-height="114%" fo:text-indent="0in" style:auto-text-indent="false" fo:padding="0in" fo:border="none"/>
    </style:style>
    <style:style style:name="P72" style:family="paragraph" style:parent-style-name="Text_20_body" style:list-style-name="L36">
      <style:paragraph-properties fo:margin-left="0in" fo:margin-right="0in" fo:margin-top="0in" fo:margin-bottom="0.0972in" style:contextual-spacing="false" fo:line-height="114%" fo:text-indent="0in" style:auto-text-indent="false" fo:padding="0in" fo:border="none"/>
    </style:style>
    <style:style style:name="P73" style:family="paragraph" style:parent-style-name="Text_20_body" style:list-style-name="L37">
      <style:paragraph-properties fo:margin-left="0in" fo:margin-right="0in" fo:margin-top="0in" fo:margin-bottom="0.0972in" style:contextual-spacing="false" fo:line-height="114%" fo:text-indent="0in" style:auto-text-indent="false" fo:padding="0in" fo:border="none"/>
    </style:style>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6"/>
    <style:style style:name="T1" style:family="text">
      <style:text-properties style:font-name="Google Sans Text"/>
    </style:style>
    <style:style style:name="T2" style:family="text">
      <style:text-properties style:font-name="Google Sans Text" fo:font-weight="bold"/>
    </style:style>
    <style:style style:name="T3" style:family="text">
      <style:text-properties style:font-name="Google Sans Text" fo:font-style="italic"/>
    </style:style>
    <style:style style:name="T4" style:family="text">
      <style:text-properties fo:font-weight="bold"/>
    </style:style>
    <style:style style:name="T5" style:family="text">
      <style:text-properties fo:font-style="italic"/>
    </style:style>
    <style:style style:name="T6" style:family="text">
      <style:text-properties style:font-name="Google San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ÁO CÁO KỸ THUẬT: QUY TRÌNH XỬ LÝ DỮ LIỆU (DATA PIPELINE)</text:h>
      <text:p text:style-name="P20">Giai đoạn 1: Data Split, Statistics, Grouping &amp; Preprocessing</text:p>
      <text:h text:style-name="P5" text:outline-level="2">1. Tổng quan Dữ liệu (Data Overview)</text:h>
      <text:p text:style-name="P44"><text:span text:style-name="T1">Dữ liệu đầu vào được sử dụng là tập </text:span><text:span text:style-name="Source_20_Text"><text:span text:style-name="T1">Obfuscated-MalMem2022.csv</text:span></text:span><text:span text:style-name="T1">. Dựa trên kết quả phân tích thống kê từ hệ thống, tập dữ liệu có các đặc trưng cơ bản sau:</text:span></text:p>
      <text:list text:style-name="L1">
        <text:list-item>
          <text:p text:style-name="P23"><text:span text:style-name="T4">Tổng số lượng mẫu (Total Rows):</text:span> 46,876 samples.</text:p>
        </text:list-item>
        <text:list-item>
          <text:p text:style-name="P23"><text:span text:style-name="T4">Tổng số lượng đặc trưng (Total Features):</text:span> 55 features (numerical).</text:p>
        </text:list-item>
        <text:list-item>
          <text:p text:style-name="P23"><text:span text:style-name="T4">Phân bổ nhãn:</text:span> Base rate của tập dữ liệu là <text:span text:style-name="T4">0.5</text:span>, với chính xác <text:span text:style-name="T4">23,438</text:span> mẫu Malware và <text:span text:style-name="T4">23,438</text:span> mẫu Benign, cho thấy dữ liệu hoàn toàn cân bằng ở mức nhãn cấp 1.</text:p>
        </text:list-item>
      </text:list>
      <text:h text:style-name="P5" text:outline-level="2">2. Kỹ thuật Phân tách Dữ liệu (Data Splitting)</text:h>
      <text:p text:style-name="P44"><text:span text:style-name="T1">Được thực hiện bởi module </text:span><text:span text:style-name="Source_20_Text"><text:span text:style-name="T1">1_split.py</text:span></text:span><text:span text:style-name="T1">.</text:span></text:p>
      <text:h text:style-name="P7" text:outline-level="3">2.1. Cấu trúc lại Nhãn (Label Engineering)</text:h>
      <text:p text:style-name="P44"><text:span text:style-name="T1">Hệ thống thực hiện bóc tách cột </text:span><text:span text:style-name="Source_20_Text"><text:span text:style-name="T1">Category</text:span></text:span><text:span text:style-name="T1"> ban đầu (đã được làm sạch đuôi </text:span><text:span text:style-name="Source_20_Text"><text:span text:style-name="T1">.raw</text:span></text:span><text:span text:style-name="T1">) để tạo ra hệ thống nhãn phân cấp 3 mức độ nhằm phục vụ cho các chiến lược huấn luyện khác nhau:</text:span></text:p>
      <text:list text:style-name="L2">
        <text:list-item>
          <text:p text:style-name="P46"><text:span text:style-name="T2">Lớp nhãn L1 (Binary):</text:span><text:span text:style-name="T1"> </text:span><text:span text:style-name="Source_20_Text"><text:span text:style-name="T1">Benign</text:span></text:span><text:span text:style-name="T1"> hoặc </text:span><text:span text:style-name="Source_20_Text"><text:span text:style-name="T1">Malware</text:span></text:span><text:span text:style-name="T1">.</text:span></text:p>
        </text:list-item>
        <text:list-item>
          <text:p text:style-name="P46"><text:span text:style-name="T2">Lớp nhãn L2 (Malware Class):</text:span><text:span text:style-name="T1"> Phân loại họ mã độc mức 1 (VD: lấy phần đầu của Category bằng </text:span><text:span text:style-name="Source_20_Text"><text:span text:style-name="T1">x.split("-")[0]</text:span></text:span><text:span text:style-name="T1">).</text:span></text:p>
        </text:list-item>
        <text:list-item>
          <text:p text:style-name="P46"><text:span text:style-name="T2">Lớp nhãn L3 (Malware Family):</text:span><text:span text:style-name="T1"> Phân loại mã độc chi tiết mức 2 (VD: </text:span><text:span text:style-name="Source_20_Text"><text:span text:style-name="T1">Spyware-Gator</text:span></text:span><text:span text:style-name="T1">, </text:span><text:span text:style-name="Source_20_Text"><text:span text:style-name="T1">Trojan-Refeso</text:span></text:span><text:span text:style-name="T1">). Các mẫu Benign được giữ nguyên nhãn </text:span><text:span text:style-name="Source_20_Text"><text:span text:style-name="T1">Benign</text:span></text:span><text:span text:style-name="T1">.</text:span></text:p>
        </text:list-item>
      </text:list>
      <text:p text:style-name="P44"><text:span text:style-name="T1">Sau khi trích xuất, các cột rò rỉ dữ liệu (Data Leakage) bao gồm </text:span><text:span text:style-name="Source_20_Text"><text:span text:style-name="T1">label_L1</text:span></text:span><text:span text:style-name="T1">, </text:span><text:span text:style-name="Source_20_Text"><text:span text:style-name="T1">label_L2</text:span></text:span><text:span text:style-name="T1">, </text:span><text:span text:style-name="Source_20_Text"><text:span text:style-name="T1">label_L3</text:span></text:span><text:span text:style-name="T1">, </text:span><text:span text:style-name="Source_20_Text"><text:span text:style-name="T1">Class</text:span></text:span><text:span text:style-name="T1">, và </text:span><text:span text:style-name="Source_20_Text"><text:span text:style-name="T1">Category</text:span></text:span><text:span text:style-name="T1"> được loại bỏ khỏi ma trận đặc trưng (X).</text:span></text:p>
      <text:h text:style-name="P7" text:outline-level="3">2.2. Phân chia Train/Val (Stratified Split)</text:h>
      <text:list text:style-name="L3">
        <text:list-item>
          <text:p text:style-name="P24"><text:span text:style-name="T4">Tỷ lệ:</text:span> 80% Training - 20% Validation/Test.</text:p>
        </text:list-item>
        <text:list-item>
          <text:p text:style-name="P47"><text:span text:style-name="T2">Kỹ thuật:</text:span><text:span text:style-name="T1"> Sử dụng </text:span><text:span text:style-name="Source_20_Text"><text:span text:style-name="T1">train_test_split</text:span></text:span><text:span text:style-name="T1"> với tham số </text:span><text:span text:style-name="Source_20_Text"><text:span text:style-name="T1">stratify=y["label_L3"]</text:span></text:span><text:span text:style-name="T1"> để đảm bảo phân phối của các họ mã độc chi tiết (L3) trên tập Train và Val là hoàn toàn đồng nhất.</text:span></text:p>
        </text:list-item>
        <text:list-item>
          <text:p text:style-name="P24"><text:soft-page-break/><text:span text:style-name="T4">Bảo mật rò rỉ:</text:span> Thực hiện kiểm tra giao thoa Index (Sanity Check). Kết quả báo cáo log xác nhận <text:span text:style-name="T4">"Giao thoa Index: 0 (PASS)"</text:span>, đảm bảo tính độc lập tuyệt đối giữa tập Train và Val.</text:p>
        </text:list-item>
      </text:list>
      <text:h text:style-name="P5" text:outline-level="2">3. Phân tích Thống kê Đặc trưng (Statistical Analysis)</text:h>
      <text:p text:style-name="P44"><text:span text:style-name="T1">Được thực hiện bởi module </text:span><text:span text:style-name="Source_20_Text"><text:span text:style-name="T1">2_stats_analysis.py</text:span></text:span><text:span text:style-name="T1"> trên tập Training. Tính toán thống kê cho 55 đặc trưng để đưa ra các quyết định chuẩn hóa.</text:span></text:p>
      <text:p text:style-name="P25">Các chỉ số được tính toán cho từng đặc trưng bao gồm:</text:p>
      <text:list text:style-name="L4">
        <text:list-item>
          <text:p text:style-name="P48"><text:span text:style-name="Source_20_Text"><text:span text:style-name="T1">min</text:span></text:span><text:span text:style-name="T1">, </text:span><text:span text:style-name="Source_20_Text"><text:span text:style-name="T1">max</text:span></text:span><text:span text:style-name="T1">, </text:span><text:span text:style-name="Source_20_Text"><text:span text:style-name="T1">mean</text:span></text:span><text:span text:style-name="T1">, </text:span><text:span text:style-name="Source_20_Text"><text:span text:style-name="T1">std</text:span></text:span><text:span text:style-name="T1">.</text:span></text:p>
        </text:list-item>
        <text:list-item>
          <text:p text:style-name="P48"><text:span text:style-name="Source_20_Text"><text:span text:style-name="T1">skewness</text:span></text:span><text:span text:style-name="T1"> (độ lệch), </text:span><text:span text:style-name="Source_20_Text"><text:span text:style-name="T1">kurtosis</text:span></text:span><text:span text:style-name="T1"> (độ nhọn).</text:span></text:p>
        </text:list-item>
        <text:list-item>
          <text:p text:style-name="P48"><text:span text:style-name="T1">Tỷ lệ giá trị 0 (</text:span><text:span text:style-name="Source_20_Text"><text:span text:style-name="T1">zero_ratio</text:span></text:span><text:span text:style-name="T1">) và số lượng giá trị duy nhất (</text:span><text:span text:style-name="Source_20_Text"><text:span text:style-name="T1">unique_values</text:span></text:span><text:span text:style-name="T1">).</text:span></text:p>
        </text:list-item>
        <text:list-item>
          <text:p text:style-name="P26">Các mốc phân vị (Quantiles): 1%, 5%, 25%, 50%, 75%, 90%, 95%, 99%.</text:p>
        </text:list-item>
        <text:list-item>
          <text:p text:style-name="P26"><text:span text:style-name="T4">Đại lượng Spread Metric:</text:span> Ưu tiên đo lường độ phân tán bằng khoảng cách giữa phân vị 95% và 5% ($Q_{95} - Q_5$). Nếu giá trị này quá nhỏ (&lt; $1e^{-8}$), hệ thống dự phòng sử dụng IQR ($Q_{75} - Q_{25}$), hoặc mức tối thiểu $1e^{-6}$.</text:p>
        </text:list-item>
      </text:list>
      <text:h text:style-name="P5" text:outline-level="2">4. Đánh giá Đặc trưng Hiếm (Rare Feature Scoring)</text:h>
      <text:p text:style-name="P44"><text:span text:style-name="T1">Được thực hiện bởi module </text:span><text:span text:style-name="Source_20_Text"><text:span text:style-name="T1">rare_scorer.py</text:span></text:span><text:span text:style-name="T1"> dành riêng cho các đặc trưng có tỷ lệ xuất hiện cực thấp.</text:span></text:p>
      <text:p text:style-name="P25">Thay vì loại bỏ thô bạo, hệ thống tính toán điểm số dựa trên phân phối nhãn của đặc trưng thông qua kỹ thuật <text:span text:style-name="T4">Bayesian Smoothing</text:span>.</text:p>
      <text:list text:style-name="L5">
        <text:list-item>
          <text:p text:style-name="P27"><text:span text:style-name="T4">Công thức Mean:</text:span> $Mean = \frac{m + \alpha}{n + 2\alpha}$ (Với $\alpha = 2.0$, $m$ là số mẫu Malware active, $n$ là tổng mẫu active).</text:p>
        </text:list-item>
        <text:list-item>
          <text:p text:style-name="P27"><text:span text:style-name="T4">Công thức Phương sai (Var):</text:span> $Var = \frac{Mean \times (1.0 - Mean)}{n + 2\alpha + 1.0}$</text:p>
        </text:list-item>
        <text:list-item>
          <text:p text:style-name="P27"><text:span text:style-name="T4">Điểm chuẩn hóa (Score):</text:span> $Score = \frac{|Mean - 0.5|}{\sqrt{Var} + 1e^{-9}}$</text:p>
        </text:list-item>
      </text:list>
      <text:p text:style-name="P42">Dựa trên điểm này, đặc trưng sẽ được giữ lại, biến đổi, hoặc bỏ đi tùy vào ngưỡng (sẽ trình bày ở phần dưới).</text:p>
      <text:h text:style-name="P5" text:outline-level="2"><text:soft-page-break/>5. Quy trình Gán hành động &amp; Phân nhóm (Action Assignment &amp; Grouping)</text:h>
      <text:p text:style-name="P44"><text:span text:style-name="T1">Được thực hiện bởi module </text:span><text:span text:style-name="Source_20_Text"><text:span text:style-name="T1">3_grouping.py</text:span></text:span><text:span text:style-name="T1">. Đây là bước cốt lõi để quyết định phép biến đổi toán học nào sẽ áp dụng lên đặc trưng nào.</text:span></text:p>
      <text:h text:style-name="P7" text:outline-level="3">5.1. Logic gán hành động (Chống Overlap)</text:h>
      <text:p text:style-name="P25">Để đảm bảo một đặc trưng chỉ rơi vào đúng một chiến lược xử lý, hệ thống sử dụng quy trình ra quyết định tuần tự (If-Else hierarchy) từ trên xuống dưới. Ngay khi thỏa mãn điều kiện, đặc trưng sẽ được gán nhãn hành động và thoát khỏi chuỗi logic:</text:p>
      <text:list text:style-name="L6">
        <text:list-item>
          <text:p text:style-name="P49"><text:span text:style-name="T2">Kiểm tra Constant:</text:span><text:span text:style-name="T1"> Nếu </text:span><text:span text:style-name="Source_20_Text"><text:span text:style-name="T1">unique_values &lt; 2</text:span></text:span><text:span text:style-name="T1"> $\rightarrow$ Gán </text:span><text:span text:style-name="Source_20_Text"><text:span text:style-name="T2">DROP_CONSTANT</text:span></text:span></text:p>
        </text:list-item>
        <text:list-item>
          <text:p text:style-name="P49"><text:span text:style-name="T2">Kiểm tra Nhiễu (Micro Noise):</text:span><text:span text:style-name="T1"> Nếu spread thực tế $\le 1e^{-6}$ và </text:span><text:span text:style-name="Source_20_Text"><text:span text:style-name="T1">unique_values &gt; 50</text:span></text:span><text:span text:style-name="T1"> $\rightarrow$ Gán </text:span><text:span text:style-name="Source_20_Text"><text:span text:style-name="T2">DROP_MICRO_NOISE</text:span></text:span></text:p>
        </text:list-item>
        <text:list-item>
          <text:p text:style-name="P49"><text:span text:style-name="T2">Kiểm tra Nhị phân (Binary):</text:span><text:span text:style-name="T1"> Nếu </text:span><text:span text:style-name="Source_20_Text"><text:span text:style-name="T1">unique_values == 2</text:span></text:span><text:span text:style-name="T1"> và tỷ lệ nhóm thiểu số $&gt; 0.001$ $\rightarrow$ Gán </text:span><text:span text:style-name="Source_20_Text"><text:span text:style-name="T2">KEEP_RAW_BINARY</text:span></text:span></text:p>
        </text:list-item>
        <text:list-item>
          <text:p text:style-name="P49"><text:span text:style-name="T2">Kiểm tra Đặc trưng hiếm:</text:span><text:span text:style-name="T1"> Nếu số lượng kiện hiếm $&lt; 50$ hoặc tỷ lệ $&lt; 0.5\%$ $\rightarrow$ Đưa qua bộ </text:span><text:span text:style-name="Source_20_Text"><text:span text:style-name="T1">RareFeatureScorer</text:span></text:span><text:span text:style-name="T1">. Dựa vào điểm số sẽ gán thành </text:span><text:span text:style-name="Source_20_Text"><text:span text:style-name="T1">KEEP_RARE_HIGH_SCORE</text:span></text:span><text:span text:style-name="T1"> (Score $\ge 2.5$), </text:span><text:span text:style-name="Source_20_Text"><text:span text:style-name="T1">TRANSFORM_RARE_MID_SCORE</text:span></text:span><text:span text:style-name="T1"> (Score $\ge 1.5$), hoặc </text:span><text:span text:style-name="Source_20_Text"><text:span text:style-name="T1">DROP_RARE_LOW_SCORE</text:span></text:span><text:span text:style-name="T1">.</text:span></text:p>
        </text:list-item>
        <text:list-item>
          <text:p text:style-name="P49"><text:span text:style-name="T2">Kiểm tra Ngoại lai (Outlier):</text:span><text:span text:style-name="T1"> Tính toán độ lệch Max so với Q99 ($max\_val / Q_{99} &gt; 10$), hoặc dựa trên Median/Std $\rightarrow$ Gán </text:span><text:span text:style-name="Source_20_Text"><text:span text:style-name="T2">TRANSFORM_OUTLIER</text:span></text:span></text:p>
        </text:list-item>
        <text:list-item>
          <text:p text:style-name="P49"><text:span text:style-name="T2">Kiểm tra Đuôi dày (Heavy Tail):</text:span><text:span text:style-name="T1"> Nếu </text:span><text:span text:style-name="Source_20_Text"><text:span text:style-name="T1">kurtosis &gt; 5.0</text:span></text:span><text:span text:style-name="T1"> $\rightarrow$ Gán </text:span><text:span text:style-name="Source_20_Text"><text:span text:style-name="T2">TRANSFORM_HEAVY_TAIL</text:span></text:span></text:p>
        </text:list-item>
        <text:list-item>
          <text:p text:style-name="P49"><text:span text:style-name="T2">Kiểm tra Đuôi dài phải (Long Tail Right):</text:span><text:span text:style-name="T1"> Nếu </text:span><text:span text:style-name="Source_20_Text"><text:span text:style-name="T1">skewness &gt; 1.0</text:span></text:span><text:span text:style-name="T1"> $\rightarrow$ Gán </text:span><text:span text:style-name="Source_20_Text"><text:span text:style-name="T2">TRANSFORM_LONG_TAIL_RIGHT</text:span></text:span></text:p>
        </text:list-item>
        <text:list-item>
          <text:p text:style-name="P49"><text:span text:style-name="T2">Kiểm tra Đuôi dài trái (Long Tail Left):</text:span><text:span text:style-name="T1"> Nếu </text:span><text:span text:style-name="Source_20_Text"><text:span text:style-name="T1">skewness &lt; -1.0</text:span></text:span><text:span text:style-name="T1"> $\rightarrow$ Gán </text:span><text:span text:style-name="Source_20_Text"><text:span text:style-name="T2">TRANSFORM_LONG_TAIL_LEFT</text:span></text:span></text:p>
        </text:list-item>
        <text:list-item>
          <text:p text:style-name="P49"><text:span text:style-name="T2">Trường hợp còn lại:</text:span><text:span text:style-name="T1"> Gán </text:span><text:span text:style-name="Source_20_Text"><text:span text:style-name="T2">KEEP_RAW_NORMAL</text:span></text:span></text:p>
        </text:list-item>
      </text:list>
      <text:h text:style-name="P7" text:outline-level="3">5.2. Kết quả Loại bỏ Đặc trưng</text:h>
      <text:p text:style-name="P44"><text:span text:style-name="T1">Dựa trên báo cáo </text:span><text:span text:style-name="Source_20_Text"><text:span text:style-name="T1">feature_groups.json</text:span></text:span><text:span text:style-name="T1">, hệ thống đã phát hiện và </text:span><text:span text:style-name="T2">loại bỏ 5 đặc trưng</text:span><text:span text:style-name="T1"> (còn lại 50 đặc trưng để huấn luyện):</text:span></text:p>
      <text:list text:style-name="L7">
        <text:list-item>
          <text:p text:style-name="P50"><text:soft-page-break/><text:span text:style-name="Source_20_Text"><text:span text:style-name="T1">pslist.nprocs64bit</text:span></text:span><text:span text:style-name="T1">, </text:span><text:span text:style-name="Source_20_Text"><text:span text:style-name="T1">handles.nport</text:span></text:span><text:span text:style-name="T1">, </text:span><text:span text:style-name="Source_20_Text"><text:span text:style-name="T1">svcscan.interactive_process_services</text:span></text:span><text:span text:style-name="T1">: Bị loại do </text:span><text:span text:style-name="T2">constant</text:span><text:span text:style-name="T1"> (unique_values = 1, spread = 0.0).</text:span></text:p>
        </text:list-item>
        <text:list-item>
          <text:p text:style-name="P50"><text:span text:style-name="Source_20_Text"><text:span text:style-name="T1">psxview.not_in_eprocess_pool_false_avg</text:span></text:span><text:span text:style-name="T1">: Bị loại do </text:span><text:span text:style-name="T2">micro_noise</text:span><text:span text:style-name="T1"> (unique_values = 159, nhưng độ phân tán spread = 0.0).</text:span></text:p>
        </text:list-item>
        <text:list-item>
          <text:p text:style-name="P50"><text:span text:style-name="Source_20_Text"><text:span text:style-name="T1">callbacks.nanonymous</text:span></text:span><text:span text:style-name="T1">: Bị loại do </text:span><text:span text:style-name="T2">rare_low_score</text:span><text:span text:style-name="T1"> (Đặc trưng hiếm nhưng Rare Score = 0.0, không mang giá trị phân loại malware).</text:span></text:p>
        </text:list-item>
      </text:list>
      <text:h text:style-name="P7" text:outline-level="3">5.3. Chiến lược Nhóm (Clustering Strategy)</text:h>
      <text:p text:style-name="P25">50 đặc trưng còn lại không được biến đổi gộp chung, mà được nhóm lại dựa trên 2 tiêu chí để ổn định thuật toán học:</text:p>
      <text:list text:style-name="L8">
        <text:list-item>
          <text:p text:style-name="P28"><text:span text:style-name="T4">Scale của Spread:</text:span> Sự chênh lệch log10 của độ phân tán giữa các feature trong cùng 1 nhóm không vượt quá $\log_{10}(3)$.</text:p>
        </text:list-item>
        <text:list-item>
          <text:p text:style-name="P28"><text:span text:style-name="T4">Maximum Magnitude:</text:span> Tỷ lệ giá trị lớn nhất giữa các feature trong nhóm không vượt quá ngưỡng 10 lần.</text:p>
        </text:list-item>
        <text:list-item>
          <text:p text:style-name="P51"><text:span text:style-name="T2">Kết quả:</text:span><text:span text:style-name="T1"> Tạo ra thành công </text:span><text:span text:style-name="T2">23 Group</text:span><text:span text:style-name="T1"> (Từ </text:span><text:span text:style-name="Source_20_Text"><text:span text:style-name="T1">Group_0</text:span></text:span><text:span text:style-name="T1"> đến </text:span><text:span text:style-name="Source_20_Text"><text:span text:style-name="T1">Group_22</text:span></text:span><text:span text:style-name="T1">).</text:span></text:p>
        </text:list-item>
      </text:list>
      <text:h text:style-name="P5" text:outline-level="2">6. Tiền Xử lý Dữ liệu Thực tế (Data Preprocessing Pipeline)</text:h>
      <text:p text:style-name="P44"><text:span text:style-name="T1">Thực thi tại module </text:span><text:span text:style-name="Source_20_Text"><text:span text:style-name="T1">4_preprocess.py</text:span></text:span><text:span text:style-name="T1">. Dựa vào file </text:span><text:span text:style-name="Source_20_Text"><text:span text:style-name="T1">preprocess_audit_report.json</text:span></text:span><text:span text:style-name="T1">, hệ thống thực hiện 3 bước xử lý tuần tự:</text:span></text:p>
      <text:h text:style-name="P7" text:outline-level="3">Bước 1: Supervised Clipping (Cắt cụt ngoại lai có kiểm soát)</text:h>
      <text:p text:style-name="P25">Kỹ thuật này được áp dụng để triệt tiêu các giá trị Outlier cực đoan mà không làm mất hình dáng phân phối.</text:p>
      <text:list text:style-name="L9">
        <text:list-item>
          <text:p text:style-name="P29"><text:span text:style-name="T4">Đối tượng miễn trừ:</text:span> Các nhóm BINARY, RARE, và NORMAL được bỏ qua (Clipped at: None) để bảo toàn giá trị gốc.</text:p>
        </text:list-item>
        <text:list-item>
          <text:p text:style-name="P29"><text:span text:style-name="T4">Đối tượng áp dụng:</text:span> Các nhóm TRANSFORM_OUTLIER, HEAVY_TAIL, LONG_TAIL.</text:p>
        </text:list-item>
        <text:list-item>
          <text:p text:style-name="P21">Kỹ thuật tính Fences (Biên):</text:p>
          <text:p text:style-name="P29">Sử dụng ranh giới Outer Fences:</text:p>
          <text:list>
            <text:list-item>
              <text:p text:style-name="P29">$Lower\_Fence = Q25 - 3 \times IQR$</text:p>
            </text:list-item>
            <text:list-item>
              <text:p text:style-name="P29">$Upper\_Fence = Q75 + 3 \times IQR$</text:p>
            </text:list-item>
            <text:list-item>
              <text:p text:style-name="P29"><text:soft-page-break/><text:span text:style-name="T4">An toàn biên:</text:span> Biên cắt bị giới hạn cứng lại không được vượt qua Q01 và Q99 của tập Train để tránh cắt vào phần dữ liệu có ý nghĩa. ($min(lower\_fence, Q01)$ và $max(upper\_fence, Q99)$).</text:p>
            </text:list-item>
          </text:list>
        </text:list-item>
        <text:list-item>
          <text:p text:style-name="P52"><text:span text:style-name="T2">Số liệu thực tế (Ví dụ từ report):</text:span><text:span text:style-name="T1"> * Cột </text:span><text:span text:style-name="Source_20_Text"><text:span text:style-name="T1">pslist.nproc</text:span></text:span><text:span text:style-name="T1"> (Group_13): Bị cắt tại $Lower = 27.0$, $Upper = 62.0$.</text:span></text:p>
          <text:list>
            <text:list-item>
              <text:p text:style-name="P52"><text:span text:style-name="T1">Cột </text:span><text:span text:style-name="Source_20_Text"><text:span text:style-name="T1">malfind.commitCharge</text:span></text:span><text:span text:style-name="T1"> (Group_11): Cắt tại $Lower = -6.0$, $Upper = 18559.0$.</text:span></text:p>
            </text:list-item>
          </text:list>
        </text:list-item>
      </text:list>
      <text:h text:style-name="P7" text:outline-level="3">Bước 2: Toán học Biến đổi (Mathematical Transformation)</text:h>
      <text:p text:style-name="P25">Hệ thống xử lý vấn đề Kurtosis và Skewness cao thông qua biến đổi phi tuyến:</text:p>
      <text:list text:style-name="L10">
        <text:list-item>
          <text:p text:style-name="P53"><text:span text:style-name="T1">Các nhóm </text:span><text:span text:style-name="Source_20_Text"><text:span text:style-name="T1">HEAVY_TAIL</text:span></text:span><text:span text:style-name="T1"> và </text:span><text:span text:style-name="Source_20_Text"><text:span text:style-name="T1">LONG_TAIL</text:span></text:span><text:span text:style-name="T1"> (Group 12 đến Group 22) được áp dụng kỹ thuật </text:span><text:span text:style-name="T2">Signed Square Root</text:span><text:span text:style-name="T1">.</text:span></text:p>
        </text:list-item>
        <text:list-item>
          <text:p text:style-name="P53"><text:span text:style-name="T2">Công thức toán học:</text:span><text:span text:style-name="T1"> $X = np.sign(x) \times \sqrt{|x|}$. Kỹ thuật này co dãn các giá trị có đuôi cực dài (ví dụ: </text:span><text:span text:style-name="Source_20_Text"><text:span text:style-name="T1">handles.nhandles</text:span></text:span><text:span text:style-name="T1"> bị giới hạn từ hàng chục ngàn xuống phạm vi hẹp hơn) trong khi vẫn bảo toàn dấu của dữ liệu.</text:span></text:p>
        </text:list-item>
        <text:list-item>
          <text:p text:style-name="P53"><text:span text:style-name="T1">Đặc biệt, nhóm </text:span><text:span text:style-name="Source_20_Text"><text:span text:style-name="T1">TRANSFORM_OUTLIER</text:span></text:span><text:span text:style-name="T1"> (Group 6 đến 11) được ghi nhận là "Outlier Clipped Only" - tức là chỉ bị giới hạn biên ở Bước 1, không áp dụng căn bậc hai ở Bước 2.</text:span></text:p>
        </text:list-item>
      </text:list>
      <text:h text:style-name="P7" text:outline-level="3">Bước 3: Chuẩn hóa Phương sai (Feature-wise StandardScaler)</text:h>
      <text:p text:style-name="P25">Đưa các đặc trưng về cùng một không gian scale hỗ trợ Model hội tụ nhanh:</text:p>
      <text:list text:style-name="L11">
        <text:list-item>
          <text:p text:style-name="P54"><text:span text:style-name="T2">Đối tượng áp dụng:</text:span><text:span text:style-name="T1"> Áp dụng thuật toán $Z-score = \frac{x - \mu}{\sigma}$ (Mean = 0, Std = 1) cho toàn bộ các nhóm TRỪ nhóm hành động </text:span><text:span text:style-name="Source_20_Text"><text:span text:style-name="T1">BINARY</text:span></text:span><text:span text:style-name="T1"> và </text:span><text:span text:style-name="Source_20_Text"><text:span text:style-name="T1">RARE</text:span></text:span><text:span text:style-name="T1">.</text:span></text:p>
        </text:list-item>
        <text:list-item>
          <text:p text:style-name="P54"><text:span text:style-name="T1">Theo </text:span><text:span text:style-name="Source_20_Text"><text:span text:style-name="T1">preprocess_audit_report.json</text:span></text:span><text:span text:style-name="T1">, </text:span><text:span text:style-name="Source_20_Text"><text:span text:style-name="T1">Group_0</text:span></text:span><text:span text:style-name="T1"> (hành động </text:span><text:span text:style-name="Source_20_Text"><text:span text:style-name="T1">KEEP_RAW_BINARY</text:span></text:span><text:span text:style-name="T1"> chứa </text:span><text:span text:style-name="Source_20_Text"><text:span text:style-name="T1">psxview.not_in_eprocess_pool</text:span></text:span><text:span text:style-name="T1">) được gắn cờ "None (Preserved Sparsity)". Việc không StandardScale các cột nhị phân giúp bảo toàn tính thưa (Sparsity) gốc, rất quan trọng để tránh làm mất ý nghĩa của biến Categorical.</text:span></text:p>
        </text:list-item>
      </text:list>
      <text:h text:style-name="P5" text:outline-level="2">7. Tổng kết Pipeline</text:h>
      <text:p text:style-name="P44"><text:span text:style-name="T1">Quá trình Data Pipeline hoạt động tự động khép kín. Dữ liệu từ 55 cột thô ban đầu, trải qua việc sàng lọc 5 cột rác nhiễu (Constant/Micro Noise), sau đó 50 cột còn lại được sắp xếp vào 23 nhóm toán học. Các mô hình chuẩn hóa (Scalers) và các tham số giới hạn (Clipping bounds) được lưu thành artifact độc lập (</text:span><text:span text:style-name="Source_20_Text"><text:span text:style-name="T1">preprocess_artifacts.pkl</text:span></text:span><text:span text:style-name="T1">) nhằm đảm bảo khả năng ánh xạ chính xác 1:1 sang môi trường Inference hoặc </text:span><text:soft-page-break/><text:span text:style-name="T1">Testing mà không xảy ra Data Leakage. Kết quả cuối cùng xuất ra tập </text:span><text:span text:style-name="Source_20_Text"><text:span text:style-name="T1">train_processed.csv</text:span></text:span><text:span text:style-name="T1"> và </text:span><text:span text:style-name="Source_20_Text"><text:span text:style-name="T1">val_processed.csv</text:span></text:span><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1"><text:soft-page-break/>BÁO CÁO KỸ THUẬT: KIẾN TRÚC MÔ HÌNH VÀ QUY TRÌNH HUẤN LUYỆN</text:h>
      <text:p text:style-name="P20">Giai đoạn 2: Dataloader, Ultimate Hybrid Model, Engine &amp; Logit Adjusted Loss</text:p>
      <text:h text:style-name="P5" text:outline-level="2">8. Cấu hình Hệ thống (Hyperparameters &amp; Configuration)</text:h>
      <text:p text:style-name="P44"><text:span text:style-name="T1">Toàn bộ các tham số điều khiển mạng được quản lý tập trung tại module </text:span><text:span text:style-name="Source_20_Text"><text:span text:style-name="T1">config.py</text:span></text:span><text:span text:style-name="T1">. Hệ thống tự động nhận diện thiết bị huấn luyện (CUDA/CPU) và thiết lập các thông số sau:</text:span></text:p>
      <text:list text:style-name="L12">
        <text:list-item>
          <text:p text:style-name="P55"><text:span text:style-name="T2">Mục tiêu phân loại (Target):</text:span><text:span text:style-name="T1"> </text:span><text:span text:style-name="Source_20_Text"><text:span text:style-name="T1">label_L3</text:span></text:span><text:span text:style-name="T1"> (Phân loại họ mã độc chi tiết).</text:span></text:p>
        </text:list-item>
        <text:list-item>
          <text:p text:style-name="P30"><text:span text:style-name="T4">Tham số Dataset:</text:span> Batch size = 256.</text:p>
        </text:list-item>
        <text:list-item>
          <text:p text:style-name="P30"><text:span text:style-name="T4">Tham số Huấn luyện (Training):</text:span> * Số Epochs tối đa: 100.</text:p>
          <text:list>
            <text:list-item>
              <text:p text:style-name="P30">Learning Rate: $2e^{-4}$ (sử dụng AdamW).</text:p>
            </text:list-item>
            <text:list-item>
              <text:p text:style-name="P30">Weight Decay: $1e^{-2}$ (giảm thiểu overfitting).</text:p>
            </text:list-item>
            <text:list-item>
              <text:p text:style-name="P30">Lực cản Gradient (Gradient Clipping): 1.0.</text:p>
            </text:list-item>
            <text:list-item>
              <text:p text:style-name="P30">Dropout Rate: 0.1 (Tắt Dropout do kiến trúc FGA đã có khả năng tự tinh lọc đặc trưng).</text:p>
            </text:list-item>
          </text:list>
        </text:list-item>
        <text:list-item>
          <text:p text:style-name="P30"><text:span text:style-name="T4">Cơ chế Early Stopping:</text:span> Patience = 20 (Dừng huấn luyện nếu F1-score trên tập Validation không tăng sau 20 epochs liên tiếp).</text:p>
        </text:list-item>
      </text:list>
      <text:h text:style-name="P5" text:outline-level="2">9. Cấu trúc Dữ liệu &amp; Dataloader (Data Alignment &amp; Loading)</text:h>
      <text:p text:style-name="P44"><text:span text:style-name="T1">Được thực hiện bởi module </text:span><text:span text:style-name="Source_20_Text"><text:span text:style-name="T1">dataset.py</text:span></text:span><text:span text:style-name="T1"> và hàm </text:span><text:span text:style-name="Source_20_Text"><text:span text:style-name="T1">load_fga_mapping</text:span></text:span><text:span text:style-name="T1"> trong </text:span><text:span text:style-name="Source_20_Text"><text:span text:style-name="T1">main.py</text:span></text:span><text:span text:style-name="T1">.</text:span></text:p>
      <text:h text:style-name="P7" text:outline-level="3">9.1. Trích xuất Cấu trúc FGA (Feature Group Alignment)</text:h>
      <text:list text:style-name="L13">
        <text:list-item>
          <text:p text:style-name="P56"><text:span text:style-name="T1">Trước khi nạp dữ liệu, hàm </text:span><text:span text:style-name="Source_20_Text"><text:span text:style-name="T1">load_fga_mapping</text:span></text:span><text:span text:style-name="T1"> sẽ đọc file </text:span><text:span text:style-name="Source_20_Text"><text:span text:style-name="T1">feature_groups.json</text:span></text:span><text:span text:style-name="T1"> từ Giai đoạn 1.</text:span></text:p>
        </text:list-item>
        <text:list-item>
          <text:p text:style-name="P56"><text:span text:style-name="T1">Trích xuất ra hai list quan trọng: </text:span><text:span text:style-name="Source_20_Text"><text:span text:style-name="T1">ordered_features</text:span></text:span><text:span text:style-name="T1"> (Danh sách tên cột đã được sắp xếp chính xác theo từng nhóm) và </text:span><text:span text:style-name="Source_20_Text"><text:span text:style-name="T1">group_counts</text:span></text:span><text:span text:style-name="T1"> (Số lượng đặc trưng trong mỗi nhóm).</text:span></text:p>
        </text:list-item>
        <text:list-item>
          <text:p text:style-name="P56"><text:soft-page-break/><text:span text:style-name="T1">Hệ thống tự động xuất ra file </text:span><text:span text:style-name="Source_20_Text"><text:span text:style-name="T1">fga_column_mapping.json</text:span></text:span><text:span text:style-name="T1"> để kiểm chứng quá trình mapping cột.</text:span></text:p>
        </text:list-item>
      </text:list>
      <text:h text:style-name="P7" text:outline-level="3">9.2. Đồng bộ Cột Dữ liệu (Column Reordering)</text:h>
      <text:list text:style-name="L14">
        <text:list-item>
          <text:p text:style-name="P57"><text:span text:style-name="T2">Kỹ thuật cốt lõi (Sửa chữa quan trọng cho FGA):</text:span><text:span text:style-name="T1"> Khi </text:span><text:span text:style-name="Source_20_Text"><text:span text:style-name="T1">MalwareDataset</text:span></text:span><text:span text:style-name="T1"> đọc file CSV (</text:span><text:span text:style-name="Source_20_Text"><text:span text:style-name="T1">train_processed.csv</text:span></text:span><text:span text:style-name="T1"> và </text:span><text:span text:style-name="Source_20_Text"><text:span text:style-name="T1">val_processed.csv</text:span></text:span><text:span text:style-name="T1">), nó không sử dụng thứ tự cột mặc định của CSV. Thay vào đó, nó ép DataFrame (</text:span><text:span text:style-name="Source_20_Text"><text:span text:style-name="T1">X_df = df[valid_ordered]</text:span></text:span><text:span text:style-name="T1">) sắp xếp lại các cột chuẩn hóa 100% theo thứ tự của </text:span><text:span text:style-name="Source_20_Text"><text:span text:style-name="T1">ordered_features</text:span></text:span><text:span text:style-name="T1">.</text:span></text:p>
        </text:list-item>
        <text:list-item>
          <text:p text:style-name="P57"><text:span text:style-name="T2">Ý nghĩa:</text:span><text:span text:style-name="T1"> Việc này đảm bảo khi biến đổi dữ liệu thành tensor, thao tác cắt tensor (</text:span><text:span text:style-name="Source_20_Text"><text:span text:style-name="T1">torch.split</text:span></text:span><text:span text:style-name="T1">) trong mô hình học sâu sẽ cắt chính xác các feature vào đúng các Group toán học tương ứng mà không bị overlap hay lệch vị trí.</text:span></text:p>
        </text:list-item>
      </text:list>
      <text:h text:style-name="P7" text:outline-level="3">9.3. Xử lý Nhãn và DataLoader</text:h>
      <text:list text:style-name="L15">
        <text:list-item>
          <text:p text:style-name="P58"><text:span text:style-name="T2">Mã hóa nhãn:</text:span><text:span text:style-name="T1"> Tự động fit </text:span><text:span text:style-name="Source_20_Text"><text:span text:style-name="T1">LabelEncoder</text:span></text:span><text:span text:style-name="T1"> trên tập Train và transform trên tập Val. Bộ encoder được lưu lại dưới dạng </text:span><text:span text:style-name="Source_20_Text"><text:span text:style-name="T1">label_encoder.pkl</text:span></text:span><text:span text:style-name="T1"> để dùng cho Inference.</text:span></text:p>
        </text:list-item>
        <text:list-item>
          <text:p text:style-name="P58"><text:span text:style-name="T2">Tối ưu RAM/VRAM:</text:span><text:span text:style-name="T1"> DataLoader sử dụng </text:span><text:span text:style-name="Source_20_Text"><text:span text:style-name="T1">pin_memory=True</text:span></text:span><text:span text:style-name="T1"> và </text:span><text:span text:style-name="Source_20_Text"><text:span text:style-name="T1">num_workers=2</text:span></text:span><text:span text:style-name="T1"> giúp tăng tốc độ đẩy batch dữ liệu từ CPU vào GPU.</text:span></text:p>
        </text:list-item>
      </text:list>
      <text:h text:style-name="P5" text:outline-level="2">10. Kiến trúc Mô hình (Ultimate Hybrid Model)</text:h>
      <text:p text:style-name="P44"><text:span text:style-name="T1">Được thực hiện tại </text:span><text:span text:style-name="Source_20_Text"><text:span text:style-name="T1">model.py</text:span></text:span><text:span text:style-name="T1">. Đây là sự kết hợp tinh hoa giữa Tokenizer chuỗi thời gian, Multi-Layer Perceptron (MLP) Attention và Transformer.</text:span></text:p>
      <text:p text:style-name="P44"><text:span text:style-name="T1">Kiến trúc bao gồm 4 bước xử lý tuần tự (Bám sát theo cấu trúc hàm </text:span><text:span text:style-name="Source_20_Text"><text:span text:style-name="T1">forward</text:span></text:span><text:span text:style-name="T1">):</text:span></text:p>
      <text:h text:style-name="P7" text:outline-level="3">Bước 1: Phân mảnh Đặc trưng (Feature Splitting)</text:h>
      <text:p text:style-name="P44"><text:span text:style-name="T1">Dữ liệu đầu vào $X$ được cắt thành các tensor nhỏ độc lập thông qua </text:span><text:span text:style-name="Source_20_Text"><text:span text:style-name="T1">torch.split(x, self.group_counts, dim=1)</text:span></text:span><text:span text:style-name="T1">. Mỗi tensor giờ đây chứa cụm các đặc trưng có chung tính chất phân phối (đã được phân nhóm ở Giai đoạn 1).</text:span></text:p>
      <text:h text:style-name="P7" text:outline-level="3">Bước 2: Token hóa và Lọc nhiễu (SinCos Tokenizer &amp; FGA Attention Pooling)</text:h>
      <text:p text:style-name="P25">Với từng cụm tính năng độc lập, hệ thống áp dụng:</text:p>
      <text:list text:style-name="L16">
        <text:list-item>
          <text:p text:style-name="P59"><text:span text:style-name="T2">SinCos Tokenizer:</text:span><text:span text:style-name="T1"> Thay vì nhúng (embedding) tuyến tính thông thường, mỗi giá trị số được mã hóa bằng hàm lượng giác để mô phỏng tần số: $emb = [\sin(2\pi \cdot x \cdot Freq), \cos(2\pi \cdot x \cdot Freq)]$. Sau đó qua lớp MLP để ánh xạ lên không gian </text:span><text:span text:style-name="Source_20_Text"><text:span text:style-name="T1">embed_dim</text:span></text:span><text:span text:style-name="T1"> (128 chiều) và cộng với </text:span><text:span text:style-name="Source_20_Text"><text:span text:style-name="T1">column_embeddings</text:span></text:span><text:span text:style-name="T1">. Dữ liệu sau đó đi qua </text:span><text:span text:style-name="Source_20_Text"><text:span text:style-name="T1">LayerNorm</text:span></text:span><text:span text:style-name="T1">.</text:span></text:p>
        </text:list-item>
        <text:list-item>
          <text:p text:style-name="P31"><text:soft-page-break/><text:span text:style-name="T4">FGA Attention Pooling (MLP):</text:span> Mỗi token của các cột trong cùng 1 nhóm sẽ đi qua một mạng MLP nhỏ (Linear $\rightarrow$ ReLU $\rightarrow$ Linear $\rightarrow$ Softmax) để tự động học ra <text:span text:style-name="T4">trọng số (weights)</text:span> độ quan trọng của từng cột.</text:p>
        </text:list-item>
        <text:list-item>
          <text:p text:style-name="P59"><text:span text:style-name="T2">Weighted Sum:</text:span><text:span text:style-name="T1"> Nhân token với trọng số và tính tổng (</text:span><text:span text:style-name="Source_20_Text"><text:span text:style-name="T1">(toks * weights).sum(dim=1)</text:span></text:span><text:span text:style-name="T1">). </text:span><text:span text:style-name="T2">Kết quả:</text:span><text:span text:style-name="T1"> Ép toàn bộ các cột trong một nhóm về thành </text:span><text:span text:style-name="T2">1 token đại diện duy nhất</text:span><text:span text:style-name="T1"> (chứa thông tin tinh hoa nhất, triệt tiêu cột nhiễu).</text:span></text:p>
        </text:list-item>
      </text:list>
      <text:h text:style-name="P7" text:outline-level="3">Bước 3 &amp; 4: Transformer Block &amp; Classification</text:h>
      <text:list text:style-name="L17">
        <text:list-item>
          <text:p text:style-name="P60"><text:span text:style-name="T2">Ghép Token:</text:span><text:span text:style-name="T1"> Các token đại diện của các nhóm được nối lại (</text:span><text:span text:style-name="Source_20_Text"><text:span text:style-name="T1">torch.cat</text:span></text:span><text:span text:style-name="T1">) và gắn thêm một tham số </text:span><text:span text:style-name="Source_20_Text"><text:span text:style-name="T1">CLS Token</text:span></text:span><text:span text:style-name="T1"> (Khởi tạo bằng Truncated Normal với độ lệch chuẩn 0.02).</text:span></text:p>
        </text:list-item>
        <text:list-item>
          <text:p text:style-name="P60"><text:span text:style-name="T2">Transformer Encoder:</text:span><text:span text:style-name="T1"> Đi qua 2 lớp Transformer Encoder tiêu chuẩn (4 Heads, feedforward = $128 \times 4$, chuẩn hóa </text:span><text:span text:style-name="Source_20_Text"><text:span text:style-name="T1">norm_first=True</text:span></text:span><text:span text:style-name="T1">).</text:span></text:p>
        </text:list-item>
        <text:list-item>
          <text:p text:style-name="P60"><text:span text:style-name="T2">Đầu ra:</text:span><text:span text:style-name="T1"> Vector trạng thái của </text:span><text:span text:style-name="Source_20_Text"><text:span text:style-name="T1">CLS Token</text:span></text:span><text:span text:style-name="T1"> ở lớp cuối cùng được rút trích và đưa qua lớp </text:span><text:span text:style-name="Source_20_Text"><text:span text:style-name="T1">Linear</text:span></text:span><text:span text:style-name="T1"> (Head) để dự đoán Logits cho $N$ lớp mã độc.</text:span></text:p>
        </text:list-item>
      </text:list>
      <text:h text:style-name="P5" text:outline-level="2">11. Kỹ thuật Hàm Mất mát và Tối ưu (Engine &amp; Logit Adjusted Loss)</text:h>
      <text:p text:style-name="P44"><text:span text:style-name="T1">Thực thi tại </text:span><text:span text:style-name="Source_20_Text"><text:span text:style-name="T1">engine.py</text:span></text:span><text:span text:style-name="T1"> và </text:span><text:span text:style-name="Source_20_Text"><text:span text:style-name="T1">main.py</text:span></text:span><text:span text:style-name="T1">.</text:span></text:p>
      <text:h text:style-name="P7" text:outline-level="3">11.1. Tối ưu Mất cân bằng lớp (Logit Adjusted Loss)</text:h>
      <text:p text:style-name="P25">Thay vì dùng class_weights truyền thống cho CrossEntropy, hệ thống sử dụng thuật toán tiên tiến <text:span text:style-name="T4">Logit Adjusted Loss (LA)</text:span> để xử lý triệt để việc mất cân bằng dữ liệu của các họ mã độc (L3 long-tail distribution).</text:p>
      <text:list text:style-name="L18">
        <text:list-item>
          <text:p text:style-name="P61"><text:span text:style-name="T2">Quy trình tính toán Priors:</text:span><text:span text:style-name="T1"> Tại </text:span><text:span text:style-name="Source_20_Text"><text:span text:style-name="T1">main.py</text:span></text:span><text:span text:style-name="T1">, hệ thống duyệt qua toàn bộ tập Train Loader một lần để đếm số lượng nhãn thực tế, từ đó tính ra Tỷ lệ phần trăm phân bố gốc (</text:span><text:span text:style-name="Source_20_Text"><text:span text:style-name="T1">class_priors</text:span></text:span><text:span text:style-name="T1">).</text:span></text:p>
        </text:list-item>
        <text:list-item>
          <text:p text:style-name="P61"><text:span text:style-name="T2">Công thức LA (trong </text:span><text:span text:style-name="Source_20_Text"><text:span text:style-name="T2">engine.py</text:span></text:span><text:span text:style-name="T2">):</text:span><text:span text:style-name="T1"> $Adjustments = \tau \times \log(Priors + 1e^{-9})$ (Với tham số $\tau = 1.0$)</text:span></text:p>
          <text:p text:style-name="P32">$Loss = CrossEntropy(Logits + Adjustments, Labels)$</text:p>
        </text:list-item>
        <text:list-item>
          <text:p text:style-name="P32"><text:span text:style-name="T4">Ý nghĩa:</text:span> Trọng số phạt $Adjustments$ mang giá trị âm, phạt các class phổ biến (kéo logit xuống) và bù trừ cho các class hiếm, buộc mô hình phải học các class hiếm tốt hơn mà không làm méo mó phân phối gradient.</text:p>
        </text:list-item>
      </text:list>
      <text:h text:style-name="P7" text:outline-level="3"><text:soft-page-break/>11.2. Kỹ thuật Cập nhật Gradient (Gradient Clipping)</text:h>
      <text:p text:style-name="P44"><text:span text:style-name="T1">Trong hàm </text:span><text:span text:style-name="Source_20_Text"><text:span text:style-name="T1">train_one_epoch</text:span></text:span><text:span text:style-name="T1">, để chống lại hiện tượng Exploding Gradients (vốn rất hay xảy ra với Transformer), hệ thống áp dụng </text:span><text:span text:style-name="Source_20_Text"><text:span text:style-name="T1">torch.nn.utils.clip_grad_norm_</text:span></text:span><text:span text:style-name="T1"> ở mức </text:span><text:span text:style-name="T2">1.0</text:span><text:span text:style-name="T1"> ngay trước bước </text:span><text:span text:style-name="Source_20_Text"><text:span text:style-name="T1">optimizer.step()</text:span></text:span><text:span text:style-name="T1">.</text:span></text:p>
      <text:h text:style-name="P5" text:outline-level="2">12. Quy trình Huấn luyện và Đánh giá (Training Loop &amp; Callbacks)</text:h>
      <text:p text:style-name="P44"><text:span text:style-name="T1">Thực thi tại </text:span><text:span text:style-name="Source_20_Text"><text:span text:style-name="T1">main.py</text:span></text:span><text:span text:style-name="T1">.</text:span></text:p>
      <text:list text:style-name="L19">
        <text:list-item>
          <text:p text:style-name="P62"><text:span text:style-name="T2">Tối ưu hóa (Optimizer):</text:span><text:span text:style-name="T1"> </text:span><text:span text:style-name="Source_20_Text"><text:span text:style-name="T1">AdamW</text:span></text:span><text:span text:style-name="T1"> - kết hợp giữa Adam và Weight Decay (chuẩn hóa L2 rời rạc).</text:span></text:p>
        </text:list-item>
        <text:list-item>
          <text:p text:style-name="P62"><text:span text:style-name="T2">Lịch trình Học rate (Scheduler):</text:span><text:span text:style-name="T1"> </text:span><text:span text:style-name="Source_20_Text"><text:span text:style-name="T1">ReduceLROnPlateau</text:span></text:span><text:span text:style-name="T1">. Hệ thống theo dõi điểm </text:span><text:span text:style-name="Source_20_Text"><text:span text:style-name="T1">Val F1</text:span></text:span><text:span text:style-name="T1">. Nếu điểm này không tăng sau </text:span><text:span text:style-name="T2">4 epochs</text:span><text:span text:style-name="T1"> (</text:span><text:span text:style-name="Source_20_Text"><text:span text:style-name="T1">patience=4</text:span></text:span><text:span text:style-name="T1">), Learning rate sẽ bị giảm đi một nửa (</text:span><text:span text:style-name="Source_20_Text"><text:span text:style-name="T1">factor=0.5</text:span></text:span><text:span text:style-name="T1">).</text:span></text:p>
        </text:list-item>
        <text:list-item>
          <text:p text:style-name="P62"><text:span text:style-name="T2">Theo dõi &amp; Lưu trữ (Checkpointing):</text:span><text:span text:style-name="T1"> Mô hình đánh giá Metric là </text:span><text:span text:style-name="T2">F1-score (Macro)</text:span><text:span text:style-name="T1"> để đảm bảo công bằng cho các class nhỏ. Nếu F1-score trên tập Validation cao nhất, hệ thống sẽ lưu tạm trọng số của mạng (</text:span><text:span text:style-name="Source_20_Text"><text:span text:style-name="T1">model.state_dict()</text:span></text:span><text:span text:style-name="T1">).</text:span></text:p>
        </text:list-item>
        <text:list-item>
          <text:p text:style-name="P62"><text:span text:style-name="T2">Early Stopping:</text:span><text:span text:style-name="T1"> Nếu F1-score Validation không tạo kỷ lục mới trong vòng 15 epochs liên tiếp (được cấu hình bởi </text:span><text:span text:style-name="Source_20_Text"><text:span text:style-name="T1">Config.PATIENCE</text:span></text:span><text:span text:style-name="T1">), vòng lặp sẽ bị bẻ gãy (Break) để tránh tốn tài nguyên và over-fitting.</text:span></text:p>
        </text:list-item>
        <text:list-item>
          <text:p text:style-name="P62"><text:span text:style-name="T2">Báo cáo cuối cùng:</text:span><text:span text:style-name="T1"> Tải lại trọng số tốt nhất (Best Weights), đánh giá lại trên tập Validation/Test và in ra màn hình </text:span><text:span text:style-name="Source_20_Text"><text:span text:style-name="T1">classification_report</text:span></text:span><text:span text:style-name="T1"> đầy đủ (bao gồm F1 Macro, Precision, Recall cho từng họ mã độc). Mọi phép chia cho 0 được xử lý an toàn với tham số </text:span><text:span text:style-name="Source_20_Text"><text:span text:style-name="T1">zero_division=0</text:span></text:span><text:span text:style-name="T1">.</text:span></text:p>
        </text:list-item>
      </text:list>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h text:style-name="P3" text:outline-level="1"><text:soft-page-break/><text:span text:style-name="T1">BÁO CÁO KỸ THUẬT: NGHIÊN CỨU CẮT BỎ (ABLATION STUDY)</text:span></text:h>
      <text:p text:style-name="Text_20_body"><text:span text:style-name="T4">Mục tiêu:</text:span> Đánh giá mức độ đóng góp độc lập và hiệu quả kết hợp của các thành phần kiến trúc: Chiến lược phân nhóm (Grouping), Màng lọc (Pooling), và Hàm mất mát (Logit Adjusted Loss) so với mô hình cơ sở (Baseline).</text:p>
      <text:h text:style-name="Heading_20_2" text:outline-level="2">1. Mốc chuẩn (Baseline)</text:h>
      <text:p text:style-name="Text_20_body">Mô hình Baseline (E0) sử dụng kiến trúc FT-Transformer truyền thống, đẩy trực tiếp 50 đặc trưng thô vào mạng mà không qua phân nhóm hay lọc nhiễu.</text:p>
      <text:list text:style-name="L23">
        <text:list-item>
          <text:p text:style-name="P74"><text:span text:style-name="T4">Kết quả:</text:span> Macro F1 đạt <text:span text:style-name="T4">0.4924 ± 0.0061</text:span>.</text:p>
        </text:list-item>
        <text:list-item>
          <text:p text:style-name="P74"><text:span text:style-name="T4">Đánh giá:</text:span> Điểm số thấp chứng tỏ khi đối mặt với lượng dữ liệu chứa nhiều biến nhiễu và độ lệch Scale lớn, cơ chế Self-Attention của Transformer bị "pha loãng", dẫn đến khả năng hội tụ kém.</text:p>
        </text:list-item>
      </text:list>
      <text:h text:style-name="Heading_20_2" text:outline-level="2">2. Cuộc chiến Phân nhóm: Ngữ nghĩa (Semantic) vs. Thống kê (Statistical)</text:h>
      <text:p text:style-name="Text_20_body">Đồ án đã thử nghiệm 2 triết lý phân chia đặc trưng cho cơ chế Feature Group Alignment (FGA):</text:p>
      <text:list text:style-name="L24">
        <text:list-item>
          <text:p text:style-name="P75"><text:span text:style-name="T4">Chiến lược 1: Theo Ngữ nghĩa hệ điều hành (Semantic FGA).</text:span> Gom 50 cột thành 5 nhóm dựa trên chức năng (Process, Malfind, DLL, Handles, Services). Kết hợp với Attention Pooling (MLP), mô hình (E2-F2b) đạt Macro F1: <text:span text:style-name="T4">0.5060</text:span>.</text:p>
        </text:list-item>
        <text:list-item>
          <text:p text:style-name="P75"><text:span text:style-name="T4">Chiến lược 2: Theo Phân phối Thống kê (Statistical FGA).</text:span> Gom 50 cột thành 23 nhóm dựa trên biên độ giá trị (Scale), độ nhọn (Kurtosis) và độ lệch (Skewness). Kết hợp với Attention Pooling (MLP), mô hình (E2-F2b) đạt Macro F1: <text:span text:style-name="T4">0.5439</text:span>.</text:p>
        </text:list-item>
      </text:list>
      <text:p text:style-name="Text_20_body"><text:span text:style-name="T4">Kết luận chuyên sâu:</text:span> Mặc dù phân nhóm theo ngữ nghĩa (Semantic) rất dễ hiểu với con người, nhưng nó lại là "thảm họa" đối với mạng nơ-ron. Việc nhét một cột có giá trị hàng chục ngàn (<text:span text:style-name="Source_20_Text">handles.nhandles</text:span>) vào chung nhóm với một cột có giá trị tỷ lệ siêu nhỏ (<text:span text:style-name="Source_20_Text">handles.avg_handles_per_proc</text:span>) làm cho bộ mã hóa <text:span text:style-name="Source_20_Text">SinCosTokenizer</text:span> bị nhiễu loạn tần số. Ngược lại, <text:span text:style-name="T4">Statistical FGA</text:span> nhóm các biến có cùng cấu trúc toán học lại với nhau, giúp mô hình tăng vọt sức mạnh (+3.79% F1) và hoạt động cực kỳ ổn định. Do đó, Thống kê được chọn làm nền tảng cốt lõi.</text:p>
      <text:h text:style-name="Heading_20_2" text:outline-level="2">3. Sức mạnh của Màng lọc Attention Pooling</text:h>
      <text:p text:style-name="Text_20_body">Sau khi đã chọn được Statistical FGA, đồ án tiến hành cắt bỏ các cơ chế gộp (Pooling) để xem đâu là cách lọc nhiễu tốt nhất:</text:p>
      <text:list text:style-name="L25">
        <text:list-item>
          <text:p text:style-name="P76"><text:span text:style-name="T4">Phá vỡ cấu trúc (Random Size &amp; Feat - E2-F4b):</text:span> Xáo trộn ngẫu nhiên các cột vào các nhóm bất kỳ. Kết quả tụt dốc thê thảm xuống <text:span text:style-name="T4">0.4653</text:span>. Điều này chứng minh logic phân nhóm của đồ án là hoàn toàn chính xác, không phải do "ăn may".</text:p>
        </text:list-item>
        <text:list-item>
          <text:p text:style-name="P76"><text:soft-page-break/><text:span text:style-name="T4">Trung bình cộng (Mean Pooling - E2-F1):</text:span> Không dùng mạng học trọng số, chỉ cộng chia trung bình. Kết quả đạt <text:span text:style-name="T4">0.4821</text:span> (Thậm chí thấp hơn Baseline). Việc gộp mù quáng làm mất đi các tín hiệu ngoại lai quan trọng.</text:p>
        </text:list-item>
        <text:list-item>
          <text:p text:style-name="P76"><text:span text:style-name="T4">Học trọng số tuyến tính (Linear Pooling - E2-F2a):</text:span> Macro F1 đạt <text:span text:style-name="T4">0.5265</text:span>.</text:p>
        </text:list-item>
        <text:list-item>
          <text:p text:style-name="P76"><text:span text:style-name="T4">Học trọng số phi tuyến (MLP Pooling - E2-F2b):</text:span> Sử dụng mạng đa tầng, Macro F1 đạt <text:span text:style-name="T4">0.5439 ± 0.0102</text:span>.</text:p>
        </text:list-item>
      </text:list>
      <text:p text:style-name="Text_20_body"><text:span text:style-name="T4">Kết luận chuyên sâu:</text:span> Cơ chế Attention Pooling (MLP) thực sự đóng vai trò như một <text:span text:style-name="T4">Nút thắt thông tin (Information Bottleneck)</text:span> hoàn hảo. Nó đủ thông minh để học được các mối quan hệ phi tuyến, triệt tiêu các đặc trưng rác và chỉ giữ lại những "tín hiệu vàng" để đẩy vào Transformer.</text:p>
      <text:h text:style-name="Heading_20_2" text:outline-level="2">4. Xử lý Mất cân bằng với Logit Adjusted Loss (LA)</text:h>
      <text:p text:style-name="Text_20_body">Một thách thức lớn của bộ dữ liệu là họ mã độc Ransomware-Pysa có số lượng mẫu rất thấp, khiến mô hình thường dự đoán hụt. Đồ án tích hợp hàm mất mát LA để phạt các lớp phổ biến và buff cho các lớp thiểu số.</text:p>
      <text:list text:style-name="L26">
        <text:list-item>
          <text:p text:style-name="P77"><text:span text:style-name="T4">LA đứng độc lập (E1-L1, Tau=1.0):</text:span> Chỉ đạt Macro F1 <text:span text:style-name="T4">0.4919</text:span>. Nếu kiến trúc mạng kém, hàm Loss có tốt đến mấy cũng không cứu vớt được.</text:p>
        </text:list-item>
        <text:list-item>
          <text:p text:style-name="P77"><text:span text:style-name="T4">Kết hợp FGA (MLP) + LA (Tau=1.0) (Cấu hình E4-C1):</text:span> Điểm Macro F1 duy trì ở mức cao <text:span text:style-name="T4">0.5413</text:span>, nhưng điểm F1 của nhóm thiểu số <text:span text:style-name="T4">Ransomware-Pysa tăng vọt lên 0.3882</text:span> (so với mức 0.318 khi chỉ dùng LA độc lập, hoặc 0.3747 của FGA thuần).</text:p>
        </text:list-item>
        <text:list-item>
          <text:p text:style-name="P77"><text:span text:style-name="T4">Quá lạm dụng LA (Rare Boost - E4-C3):</text:span> Việc ép phạt quá mạnh làm mô hình bị mất phương hướng, điểm Macro F1 rơi tự do xuống <text:span text:style-name="T4">0.4625</text:span>.</text:p>
        </text:list-item>
      </text:list>
      <text:h text:style-name="Heading_20_2" text:outline-level="2">5. Kết luận: Mô hình Tối ưu nhất (The Ultimate Combo)</text:h>
      <text:p text:style-name="Text_20_body">Đồ án thử nghiệm cấu hình "Full Combo" (E4-C5) kết hợp cả FGA, LA và Supervised Contrastive Learning (SupCon). Tuy nhiên, kết quả cho thấy SupCon không mang lại giá trị gia tăng, thậm chí làm điểm số giảm nhẹ xuống <text:span text:style-name="T4">0.5389</text:span> và làm tăng độ phức tạp thuật toán.</text:p>
      <text:p text:style-name="Text_20_body"><text:span text:style-name="T4">Quyết định cuối cùng:</text:span> Kiến trúc <text:span text:style-name="T4">E4-C1: Combo FGA (MLP Pooling theo Thống kê) kết hợp Logit Adjusted Loss (Tau = 1.0)</text:span> được chọn làm Mô hình Tối ưu (Ultimate Hybrid Model). Sự kết hợp này mang lại mức tăng trưởng <text:span text:style-name="T4">+4.89% Macro F1</text:span> so với Baseline, cân bằng được khả năng chống nhiễu mạnh mẽ của FGA và khả năng bảo vệ các họ mã độc thiểu số của thuật toán LA</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16"><text:soft-page-break/></text:p>
      <text:p text:style-name="P16"/>
      <text:p text:style-name="P16"/>
      <text:h text:style-name="P2" text:outline-level="1">BÁO CÁO KHOA HỌC: ĐÁNH GIÁ CẤU TRÚC PHÂN RÃ ĐẶC TRƯNG VÀ TỐI ƯU HÓA NHẬN DIỆN MÃ ĐỘC FILELESS</text:h>
      <text:h text:style-name="P6" text:outline-level="2">1. Đặt vấn đề &amp; Mục tiêu</text:h>
      <text:p text:style-name="P41">Nghiên cứu này tiến hành các thử nghiệm phân rã (Ablation Study) nhằm xác định kiến trúc học sâu tối ưu nhất cho bài toán phát hiện mã độc Fileless trên bộ dữ liệu CIC-MalMem-2022. Quá trình đánh giá tập trung vào 3 mũi nhọn:</text:p>
      <text:list text:style-name="L39">
        <text:list-item>
          <text:p text:style-name="P39"><text:span text:style-name="T4">Hệ tư tưởng phân rã:</text:span> So sánh hiệu quả giữa việc nhóm đặc trưng dựa trên Kiến thức chuyên gia (Semantic OS) và Phân phối Thống kê (Data-Driven/Stats).</text:p>
        </text:list-item>
        <text:list-item>
          <text:p text:style-name="P39"><text:span text:style-name="T4">Cơ chế lọc nhiễu:</text:span> Đánh giá vai trò của Trọng số động (Attention Pooling) so với các phương pháp gộp truyền thống.</text:p>
        </text:list-item>
        <text:list-item>
          <text:p text:style-name="P39"><text:span text:style-name="T4">Chiến lược xử lý mất cân bằng &amp; Tổ hợp SOTA:</text:span> Phân tích ảnh hưởng của Contrastive Learning (SupCon), Logit Adjustment (LA), và đề xuất Tổ hợp Tối ưu (Ultimate Combo).</text:p>
        </text:list-item>
      </text:list>
      <text:p text:style-name="P12"/>
      <text:h text:style-name="P6" text:outline-level="2">2. Kết quả Thực nghiệm và Thảo luận</text:h>
      <text:h text:style-name="P8" text:outline-level="3">2.1. Phân rã Đặc trưng: Ngữ nghĩa (Semantic) vs. Thống kê (Statistical)</text:h>
      <text:p text:style-name="P43">Mục tiêu: Đánh giá cách gom nhóm đặc trưng nào giúp mô hình nhận diện tốt hơ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text:span text:style-name="Strong_20_Emphasis"><text:span text:style-name="T1">Hệ tư tưởng gom nhóm</text:span></text:span></text:p>
            </table:table-cell>
            <table:table-cell table:style-name="Table1.A1" office:value-type="string">
              <text:p text:style-name="P17"><text:span text:style-name="Strong_20_Emphasis"><text:span text:style-name="T1">Kiến trúc Pooling</text:span></text:span></text:p>
            </table:table-cell>
            <table:table-cell table:style-name="Table1.A1" office:value-type="string">
              <text:p text:style-name="P17"><text:span text:style-name="Strong_20_Emphasis"><text:span text:style-name="T1">Macro F1</text:span></text:span></text:p>
            </table:table-cell>
          </table:table-row>
        </table:table-header-rows>
        <table:table-row>
          <table:table-cell table:style-name="Table1.A1" office:value-type="string">
            <text:p text:style-name="P18">Baseline (Không gom nhóm)</text:p>
          </table:table-cell>
          <table:table-cell table:style-name="Table1.A1" office:value-type="string">
            <text:p text:style-name="P18">N/A</text:p>
          </table:table-cell>
          <table:table-cell table:style-name="Table1.A1" office:value-type="string">
            <text:p text:style-name="P18">0.4900 ± 0.01</text:p>
          </table:table-cell>
        </table:table-row>
        <table:table-row>
          <table:table-cell table:style-name="Table1.A1" office:value-type="string">
            <text:p text:style-name="P19">Strict Semantic (Chuyên gia OS)</text:p>
          </table:table-cell>
          <table:table-cell table:style-name="Table1.A1" office:value-type="string">
            <text:p text:style-name="P18">Attention (MLP)</text:p>
          </table:table-cell>
          <table:table-cell table:style-name="Table1.A1" office:value-type="string">
            <text:p text:style-name="P18">0.5060 ± 0.0102</text:p>
          </table:table-cell>
        </table:table-row>
        <table:table-row>
          <table:table-cell table:style-name="Table1.A1" office:value-type="string">
            <text:p text:style-name="P19">Distribution Stats (Dữ liệu ngầm)</text:p>
          </table:table-cell>
          <table:table-cell table:style-name="Table1.A1" office:value-type="string">
            <text:p text:style-name="P18">Attention (MLP)</text:p>
          </table:table-cell>
          <table:table-cell table:style-name="Table1.A1" office:value-type="string">
            <text:p text:style-name="P19">0.5439 ± 0.0102</text:p>
          </table:table-cell>
        </table:table-row>
      </table:table>
      <text:p text:style-name="P22">Phân tích học thuật:</text:p>
      <text:p text:style-name="P41">Kết quả thực nghiệm bác bỏ giả thuyết ban đầu rằng việc phân nhóm dựa trên chức năng hệ điều hành (Tiến trình, Bộ nhớ, Handle...) sẽ tối ưu hóa nhận thức của mô hình. Cấu hình <text:span text:style-name="T4">Semantic chỉ đạt 0.5060</text:span>, thấp hơn đáng kể so với <text:span text:style-name="T4">Stats (0.5439)</text:span>.</text:p>
      <text:p text:style-name="P41"><text:soft-page-break/>Điều này chứng minh: Mã độc Fileless hoạt động bằng cách vắt chéo các miền chức năng (Cross-domain) để trốn tránh. Phương pháp gom nhóm theo Thống kê (Stats) đã vô tình bắt được các <text:span text:style-name="T4">tương quan biến động ngầm (Latent Statistical Patterns)</text:span> giữa các vùng nhớ dường như không liên quan, từ đó cung cấp lượng thông tin định tuyến tốt hơn cho Transformer.</text:p>
      <text:h text:style-name="P8" text:outline-level="3">2.2. Đánh giá cơ chế Attention Pooling (Xử lý nhiễu nội bộ)</text:h>
      <text:p text:style-name="P43">Mục tiêu: Chứng minh F1 tăng vọt là nhờ cơ chế lọc nhiễu, không phải do cắt nhỏ dữ liệu ngẫu nhiê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7"><text:span text:style-name="Strong_20_Emphasis"><text:span text:style-name="T1">ID</text:span></text:span></text:p>
            </table:table-cell>
            <table:table-cell table:style-name="Table2.A1" office:value-type="string">
              <text:p text:style-name="P17"><text:span text:style-name="Strong_20_Emphasis"><text:span text:style-name="T1">Cấu hình FGA (Stats)</text:span></text:span></text:p>
            </table:table-cell>
            <table:table-cell table:style-name="Table2.A1" office:value-type="string">
              <text:p text:style-name="P17"><text:span text:style-name="Strong_20_Emphasis"><text:span text:style-name="T1">Macro F1</text:span></text:span></text:p>
            </table:table-cell>
            <table:table-cell table:style-name="Table2.A1" office:value-type="string">
              <text:p text:style-name="P17"><text:span text:style-name="Strong_20_Emphasis"><text:span text:style-name="T1">Trạng thái nhiễu</text:span></text:span></text:p>
            </table:table-cell>
          </table:table-row>
        </table:table-header-rows>
        <table:table-row>
          <table:table-cell table:style-name="Table2.A1" office:value-type="string">
            <text:p text:style-name="P18">E2-F4a</text:p>
          </table:table-cell>
          <table:table-cell table:style-name="Table2.A1" office:value-type="string">
            <text:p text:style-name="P18">Kích thước &amp; Đặc trưng Ngẫu nhiên</text:p>
          </table:table-cell>
          <table:table-cell table:style-name="Table2.A1" office:value-type="string">
            <text:p text:style-name="P18">0.4935 ± 0.0117</text:p>
          </table:table-cell>
          <table:table-cell table:style-name="Table2.A1" office:value-type="string">
            <text:p text:style-name="P18">Nhiễu toàn phần</text:p>
          </table:table-cell>
        </table:table-row>
        <table:table-row>
          <table:table-cell table:style-name="Table2.A1" office:value-type="string">
            <text:p text:style-name="P18">E2-F1</text:p>
          </table:table-cell>
          <table:table-cell table:style-name="Table2.A1" office:value-type="string">
            <text:p text:style-name="P18">Mean Pooling (Trung bình cộng)</text:p>
          </table:table-cell>
          <table:table-cell table:style-name="Table2.A1" office:value-type="string">
            <text:p text:style-name="P18">0.5229 ± 0.0001</text:p>
          </table:table-cell>
          <table:table-cell table:style-name="Table2.A1" office:value-type="string">
            <text:p text:style-name="P18">Bị pha loãng</text:p>
          </table:table-cell>
        </table:table-row>
        <table:table-row>
          <table:table-cell table:style-name="Table2.A1" office:value-type="string">
            <text:p text:style-name="P18">E2-F2a</text:p>
          </table:table-cell>
          <table:table-cell table:style-name="Table2.A1" office:value-type="string">
            <text:p text:style-name="P18">Attention Pooling (Linear)</text:p>
          </table:table-cell>
          <table:table-cell table:style-name="Table2.A1" office:value-type="string">
            <text:p text:style-name="P18">0.5265 ± 0.0156</text:p>
          </table:table-cell>
          <table:table-cell table:style-name="Table2.A1" office:value-type="string">
            <text:p text:style-name="P18">Lọc cơ bản</text:p>
          </table:table-cell>
        </table:table-row>
        <table:table-row>
          <table:table-cell table:style-name="Table2.A1" office:value-type="string">
            <text:p text:style-name="P19">E2-F2b</text:p>
          </table:table-cell>
          <table:table-cell table:style-name="Table2.A1" office:value-type="string">
            <text:p text:style-name="P19">Attention Pooling (MLP)</text:p>
          </table:table-cell>
          <table:table-cell table:style-name="Table2.A1" office:value-type="string">
            <text:p text:style-name="P19">0.5439 ± 0.0102</text:p>
          </table:table-cell>
          <table:table-cell table:style-name="Table2.A1" office:value-type="string">
            <text:p text:style-name="P19">Tối ưu hóa</text:p>
          </table:table-cell>
        </table:table-row>
      </table:table>
      <text:p text:style-name="P22">Phân tích học thuật:</text:p>
      <text:p text:style-name="P41">Việc chỉ chia nhỏ dữ liệu rồi cộng trung bình (Mean Pooling) giúp cải thiện F1 lên 0.5229. Tuy nhiên, khi áp dụng <text:span text:style-name="T4">Attention MLP</text:span>, điểm số vọt lên mức đỉnh <text:span text:style-name="T4">0.5439</text:span>. Khẳng định rằng: Sức mạnh thực sự của FGA nằm ở mạng nơ-ron đánh giá (Attention), cho phép triệt tiêu các đặc trưng rác (như tiến trình hệ thống hợp lệ) và phóng đại các dấu hiệu tiêm mã độc hại bên trong mỗi nhóm.</text:p>
      <text:h text:style-name="P8" text:outline-level="3">2.3. Hạn chế của Contrastive Learning (Lời nguyền SupCo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7"><text:span text:style-name="Strong_20_Emphasis"><text:span text:style-name="T1">Cấu hình</text:span></text:span></text:p>
            </table:table-cell>
            <table:table-cell table:style-name="Table3.A1" office:value-type="string">
              <text:p text:style-name="P17"><text:span text:style-name="Strong_20_Emphasis"><text:span text:style-name="T1">Macro F1</text:span></text:span></text:p>
            </table:table-cell>
            <table:table-cell table:style-name="Table3.A1" office:value-type="string">
              <text:p text:style-name="P17"><text:span text:style-name="Strong_20_Emphasis"><text:span text:style-name="T1">Đánh giá</text:span></text:span></text:p>
            </table:table-cell>
          </table:table-row>
        </table:table-header-rows>
        <table:table-row>
          <table:table-cell table:style-name="Table3.A1" office:value-type="string">
            <text:p text:style-name="P18">Baseline</text:p>
          </table:table-cell>
          <table:table-cell table:style-name="Table3.A1" office:value-type="string">
            <text:p text:style-name="P18">~0.4900</text:p>
          </table:table-cell>
          <table:table-cell table:style-name="Table3.A1" office:value-type="string">
            <text:p text:style-name="P18">Nền tảng</text:p>
          </table:table-cell>
        </table:table-row>
        <table:table-row>
          <table:table-cell table:style-name="Table3.A1" office:value-type="string">
            <text:p text:style-name="P19">E3-S1/S4 (SupCon)</text:p>
          </table:table-cell>
          <table:table-cell table:style-name="Table3.A1" office:value-type="string">
            <text:p text:style-name="P19">0.147x ± 0.185</text:p>
          </table:table-cell>
          <table:table-cell table:style-name="Table3.A1" office:value-type="string">
            <text:p text:style-name="P19">Sụp đổ biểu diễn (Collapse)</text:p>
          </table:table-cell>
        </table:table-row>
      </table:table>
      <text:p text:style-name="P22">Phân tích học thuật:</text:p>
      <text:p text:style-name="P41">Mặc dù Supervised Contrastive Learning là State-of-the-Art trong phân tích hình ảnh, thực nghiệm chứng minh nó <text:span text:style-name="T4">thất bại hoàn toàn (F1 rớt xuống 0.14)</text:span> trên dữ liệu Memory Forensics. Lý do: Dữ liệu cấu trúc bảng (Tabular) không cho phép các phép Data Augmentation mạnh tay (như xoay, cắt nhiễu). Việc ép buộc hàm Loss Contrastive đã gây ra hiện tượng sụp đổ không gian nhúng (Representation Collapse). FGA giải quyết vấn đề từ Input thay vì bóp méo Output như SupCon.</text:p>
      <text:h text:style-name="P8" text:outline-level="3"><text:soft-page-break/>2.4. Tổ hợp Tối ưu (Ultimate Combo): FGA + LA</text:h>
      <text:p text:style-name="P43">Mục tiêu: Đưa ra cấu hình State-of-the-Art (SOTA) cân bằng giữa phát hiện tổng thể và cứu vớt class hiếm (Ransomwar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7"><text:span text:style-name="Strong_20_Emphasis"><text:span text:style-name="T1">ID</text:span></text:span></text:p>
            </table:table-cell>
            <table:table-cell table:style-name="Table4.A1" office:value-type="string">
              <text:p text:style-name="P17"><text:span text:style-name="Strong_20_Emphasis"><text:span text:style-name="T1">Cấu hình</text:span></text:span></text:p>
            </table:table-cell>
            <table:table-cell table:style-name="Table4.A1" office:value-type="string">
              <text:p text:style-name="P17"><text:span text:style-name="Strong_20_Emphasis"><text:span text:style-name="T1">Macro F1 Tổng</text:span></text:span></text:p>
            </table:table-cell>
            <table:table-cell table:style-name="Table4.A1" office:value-type="string">
              <text:p text:style-name="P17"><text:span text:style-name="Strong_20_Emphasis"><text:span text:style-name="T1">Spyware F1</text:span></text:span></text:p>
            </table:table-cell>
            <table:table-cell table:style-name="Table4.A1" office:value-type="string">
              <text:p text:style-name="P17"><text:span text:style-name="Strong_20_Emphasis"><text:span text:style-name="T1">Trojan F1</text:span></text:span></text:p>
            </table:table-cell>
            <table:table-cell table:style-name="Table4.A1" office:value-type="string">
              <text:p text:style-name="P17"><text:span text:style-name="Strong_20_Emphasis"><text:span text:style-name="T1">Ransomware F1 (Class hiếm nhất)</text:span></text:span></text:p>
            </table:table-cell>
          </table:table-row>
        </table:table-header-rows>
        <table:table-row>
          <table:table-cell table:style-name="Table4.A1" office:value-type="string">
            <text:p text:style-name="P18">E2-F2b</text:p>
          </table:table-cell>
          <table:table-cell table:style-name="Table4.A1" office:value-type="string">
            <text:p text:style-name="P18">FGA (MLP) Độc lập</text:p>
          </table:table-cell>
          <table:table-cell table:style-name="Table4.A1" office:value-type="string">
            <text:p text:style-name="P19">0.5439</text:p>
          </table:table-cell>
          <table:table-cell table:style-name="Table4.A1" office:value-type="string">
            <text:p text:style-name="P18">0.7075</text:p>
          </table:table-cell>
          <table:table-cell table:style-name="Table4.A1" office:value-type="string">
            <text:p text:style-name="P19">0.6282</text:p>
          </table:table-cell>
          <table:table-cell table:style-name="Table4.A1" office:value-type="string">
            <text:p text:style-name="P18">0.3747</text:p>
          </table:table-cell>
        </table:table-row>
        <table:table-row>
          <table:table-cell table:style-name="Table4.A1" office:value-type="string">
            <text:p text:style-name="P18">E4-C3</text:p>
          </table:table-cell>
          <table:table-cell table:style-name="Table4.A1" office:value-type="string">
            <text:p text:style-name="P18">FGA + LA (Rare Boost)</text:p>
          </table:table-cell>
          <table:table-cell table:style-name="Table4.A1" office:value-type="string">
            <text:p text:style-name="P18">0.4625</text:p>
          </table:table-cell>
          <table:table-cell table:style-name="Table4.A1" office:value-type="string">
            <text:p text:style-name="P18">0.4615</text:p>
          </table:table-cell>
          <table:table-cell table:style-name="Table4.A1" office:value-type="string">
            <text:p text:style-name="P18">0.4530</text:p>
          </table:table-cell>
          <table:table-cell table:style-name="Table4.A1" office:value-type="string">
            <text:p text:style-name="P18">0.2985 (Sốc thuốc)</text:p>
          </table:table-cell>
        </table:table-row>
        <table:table-row>
          <table:table-cell table:style-name="Table4.A1" office:value-type="string">
            <text:p text:style-name="P19">E4-C1</text:p>
          </table:table-cell>
          <table:table-cell table:style-name="Table4.A1" office:value-type="string">
            <text:p text:style-name="P19">FGA (MLP) + LA (Tau=1.0)</text:p>
          </table:table-cell>
          <table:table-cell table:style-name="Table4.A1" office:value-type="string">
            <text:p text:style-name="P18">0.5413</text:p>
          </table:table-cell>
          <table:table-cell table:style-name="Table4.A1" office:value-type="string">
            <text:p text:style-name="P18">0.7013</text:p>
          </table:table-cell>
          <table:table-cell table:style-name="Table4.A1" office:value-type="string">
            <text:p text:style-name="P18">0.6092</text:p>
          </table:table-cell>
          <table:table-cell table:style-name="Table4.A1" office:value-type="string">
            <text:p text:style-name="P19">0.3882 (Tối đa hóa)</text:p>
          </table:table-cell>
        </table:table-row>
      </table:table>
      <text:p text:style-name="P22">Phân tích học thuật &amp; Đề xuất:</text:p>
      <text:p text:style-name="P41">Sự kết hợp giữa FGA (MLP) và Logit Adjustment gốc (Tau=1.0) là <text:span text:style-name="T4">Kiến trúc đề xuất cuối cùng</text:span>.</text:p>
      <text:p text:style-name="P41">Mặc dù Macro F1 tổng đi ngang (0.5413 so với 0.5439), cấu hình này đã tạo ra sức mạnh cộng hưởng:</text:p>
      <text:list text:style-name="L41">
        <text:list-item>
          <text:p text:style-name="P40"><text:span text:style-name="T4">FGA</text:span> làm sạch không gian dữ liệu ở đầu vào.</text:p>
        </text:list-item>
        <text:list-item>
          <text:p text:style-name="P40"><text:span text:style-name="T4">LA (Tau=1.0)</text:span> dịch chuyển đường biên quyết định ở đầu ra một cách vừa phải trên nền dữ liệu đã sạch, giúp F1 của con mã độc khó nhằn nhất (<text:span text:style-name="T4">Ransomware-Pysa</text:span>) đạt mức đỉnh <text:span text:style-name="T4">0.3882</text:span>.</text:p>
        </text:list-item>
        <text:list-item>
          <text:p text:style-name="P40"><text:span text:style-name="T5">Lưu ý:</text:span> Việc dùng hình phạt quá mạnh (Rare Boost ở E4-C3) gây ra hiện tượng <text:span text:style-name="T5">Over-correction (Điều chỉnh thái quá)</text:span>, làm sụp đổ toàn bộ độ chính xác.</text:p>
        </text:list-item>
      </text:list>
      <text:p text:style-name="P12"/>
      <text:h text:style-name="P6" text:outline-level="2">3. Mã Nguồn Tạo Biểu Đồ (Python - Matplotlib/Seaborn)</text:h>
      <text:p text:style-name="P41">Ông hãy copy đoạn code này, chạy trên bất kỳ môi trường Python nào (Jupyter/Colab/Local) để nó tự động xuất ra 3 file ảnh chất lượng cao (.PNG độ phân giải 300dpi) dán thẳng vào luận văn/Slide.</text:p>
      <text:p text:style-name="P41">Python</text:p>
      <text:p text:style-name="P13"><text:span text:style-name="Source_20_Text"><text:span text:style-name="T1">import matplotlib.pyplot as plt</text:span></text:span></text:p>
      <text:p text:style-name="P13"><text:span text:style-name="Source_20_Text"><text:span text:style-name="T1">import numpy as np</text:span></text:span></text:p>
      <text:p text:style-name="P14"/>
      <text:p text:style-name="P13"><text:soft-page-break/><text:span text:style-name="Source_20_Text"><text:span text:style-name="T1"># Cấu hình font chữ học thuật</text:span></text:span></text:p>
      <text:p text:style-name="P13"><text:span text:style-name="Source_20_Text"><text:span text:style-name="T1">plt.rcParams.update({'font.size': 12, 'font.family': 'sans-serif'})</text:span></text:span></text:p>
      <text:p text:style-name="P14"/>
      <text:p text:style-name="P13"><text:span text:style-name="Source_20_Text"><text:span text:style-name="T1"># ==========================================</text:span></text:span></text:p>
      <text:p text:style-name="P13"><text:span text:style-name="Source_20_Text"><text:span text:style-name="T1"># BIỂU ĐỒ 1: SEMANTIC vs STATISTICAL GROUPING</text:span></text:span></text:p>
      <text:p text:style-name="P13"><text:span text:style-name="Source_20_Text"><text:span text:style-name="T1"># ==========================================</text:span></text:span></text:p>
      <text:p text:style-name="P13"><text:span text:style-name="Source_20_Text"><text:span text:style-name="T1">def plot_semantic_vs_stats():</text:span></text:span></text:p>
      <text:p text:style-name="P13"><text:span text:style-name="Source_20_Text"><text:s text:c="4"/></text:span><text:span text:style-name="Source_20_Text"><text:span text:style-name="T1">labels = ['Baseline\n(No Grouping)', 'Semantic\n(OS Logic)', 'Statistical\n(Data-Driven)']</text:span></text:span></text:p>
      <text:p text:style-name="P13"><text:span text:style-name="Source_20_Text"><text:s text:c="4"/></text:span><text:span text:style-name="Source_20_Text"><text:span text:style-name="T1">f1_scores = [0.4900, 0.5060, 0.5439]</text:span></text:span></text:p>
      <text:p text:style-name="P13"><text:span text:style-name="Source_20_Text"><text:s text:c="4"/></text:span><text:span text:style-name="Source_20_Text"><text:span text:style-name="T1">colors = ['#cccccc', '#ff9999', '#66b3ff']</text:span></text:span></text:p>
      <text:p text:style-name="P14"><text:span text:style-name="Source_20_Text"><text:s text:c="4"/></text:span></text:p>
      <text:p text:style-name="P13"><text:span text:style-name="Source_20_Text"><text:s text:c="4"/></text:span><text:span text:style-name="Source_20_Text"><text:span text:style-name="T1">fig, ax = plt.subplots(figsize=(7, 5))</text:span></text:span></text:p>
      <text:p text:style-name="P13"><text:span text:style-name="Source_20_Text"><text:s text:c="4"/></text:span><text:span text:style-name="Source_20_Text"><text:span text:style-name="T1">bars = ax.bar(labels, f1_scores, color=colors, edgecolor='black', width=0.5)</text:span></text:span></text:p>
      <text:p text:style-name="P14"><text:span text:style-name="Source_20_Text"><text:s text:c="4"/></text:span></text:p>
      <text:p text:style-name="P13"><text:span text:style-name="Source_20_Text"><text:s text:c="4"/></text:span><text:span text:style-name="Source_20_Text"><text:span text:style-name="T1">ax.set_ylim(0.40, 0.58)</text:span></text:span></text:p>
      <text:p text:style-name="P13"><text:span text:style-name="Source_20_Text"><text:s text:c="4"/></text:span><text:span text:style-name="Source_20_Text"><text:span text:style-name="T1">ax.set_ylabel('Macro F1 Score', fontweight='bold')</text:span></text:span></text:p>
      <text:p text:style-name="P13"><text:span text:style-name="Source_20_Text"><text:s text:c="4"/></text:span><text:span text:style-name="Source_20_Text"><text:span text:style-name="T1">ax.set_title('Figure 1: Feature Grouping Strategies Comparison', pad=20, fontweight='bold')</text:span></text:span></text:p>
      <text:p text:style-name="P14"><text:span text:style-name="Source_20_Text"><text:s text:c="4"/></text:span></text:p>
      <text:p text:style-name="P13"><text:span text:style-name="Source_20_Text"><text:s text:c="4"/></text:span><text:span text:style-name="Source_20_Text"><text:span text:style-name="T1"># Hiển thị số trên cột</text:span></text:span></text:p>
      <text:p text:style-name="P13"><text:span text:style-name="Source_20_Text"><text:s text:c="4"/></text:span><text:span text:style-name="Source_20_Text"><text:span text:style-name="T1">for bar in bars:</text:span></text:span></text:p>
      <text:p text:style-name="P14"><text:span text:style-name="Source_20_Text"><text:s text:c="8"/></text:span><text:span text:style-name="Source_20_Text"><text:span text:style-name="T1">height = bar.get_height()</text:span></text:span></text:p>
      <text:p text:style-name="P13"><text:span text:style-name="Source_20_Text"><text:s text:c="8"/></text:span><text:span text:style-name="Source_20_Text"><text:span text:style-name="T1">ax.text(bar.get_x() + bar.get_width()/2., height + 0.002,</text:span></text:span></text:p>
      <text:p text:style-name="P13"><text:span text:style-name="Source_20_Text"><text:s text:c="16"/></text:span><text:span text:style-name="Source_20_Text"><text:span text:style-name="T1">f'{height:.4f}', ha='center', va='bottom', fontweight='bold')</text:span></text:span></text:p>
      <text:p text:style-name="P14"><text:span text:style-name="Source_20_Text"><text:s text:c="4"/></text:span></text:p>
      <text:p text:style-name="P13"><text:span text:style-name="Source_20_Text"><text:s text:c="4"/></text:span><text:span text:style-name="Source_20_Text"><text:span text:style-name="T1">plt.grid(axis='y', linestyle='--', alpha=0.7)</text:span></text:span></text:p>
      <text:p text:style-name="P14"><text:span text:style-name="Source_20_Text"><text:s text:c="4"/></text:span><text:span text:style-name="Source_20_Text"><text:span text:style-name="T1">plt.tight_layout()</text:span></text:span></text:p>
      <text:p text:style-name="P13"><text:span text:style-name="Source_20_Text"><text:s text:c="4"/></text:span><text:span text:style-name="Source_20_Text"><text:span text:style-name="T1">plt.savefig('fig1_semantic_vs_stats.png', dpi=300)</text:span></text:span></text:p>
      <text:p text:style-name="P14"><text:span text:style-name="Source_20_Text"><text:s text:c="4"/></text:span><text:span text:style-name="Source_20_Text"><text:span text:style-name="T1">plt.show()</text:span></text:span></text:p>
      <text:p text:style-name="P14"/>
      <text:p text:style-name="P13"><text:span text:style-name="Source_20_Text"><text:span text:style-name="T1"># ==========================================</text:span></text:span></text:p>
      <text:p text:style-name="P13"><text:span text:style-name="Source_20_Text"><text:span text:style-name="T1"># BIỂU ĐỒ 2: ATTENTION POOLING PROGRESSION</text:span></text:span></text:p>
      <text:p text:style-name="P13"><text:span text:style-name="Source_20_Text"><text:span text:style-name="T1"># ==========================================</text:span></text:span></text:p>
      <text:p text:style-name="P13"><text:span text:style-name="Source_20_Text"><text:span text:style-name="T1">def plot_pooling_mechanisms():</text:span></text:span></text:p>
      <text:p text:style-name="P13"><text:span text:style-name="Source_20_Text"><text:s text:c="4"/></text:span><text:span text:style-name="Source_20_Text"><text:span text:style-name="T1">labels = ['Baseline', 'Mean Pool\n(Pha loãng)', 'Attention Linear\n(Lọc cơ bản)', 'Attention MLP\n(Tối ưu)']</text:span></text:span></text:p>
      <text:p text:style-name="P13"><text:span text:style-name="Source_20_Text"><text:s text:c="4"/></text:span><text:span text:style-name="Source_20_Text"><text:span text:style-name="T1">f1_scores = [0.4900, 0.5229, 0.5265, 0.5439]</text:span></text:span></text:p>
      <text:p text:style-name="P14"><text:span text:style-name="Source_20_Text"><text:s text:c="4"/></text:span></text:p>
      <text:p text:style-name="P13"><text:span text:style-name="Source_20_Text"><text:s text:c="4"/></text:span><text:span text:style-name="Source_20_Text"><text:span text:style-name="T1">fig, ax = plt.subplots(figsize=(8, 5))</text:span></text:span></text:p>
      <text:p text:style-name="P13"><text:span text:style-name="Source_20_Text"><text:s text:c="4"/></text:span><text:span text:style-name="Source_20_Text"><text:span text:style-name="T1">ax.plot(labels, f1_scores, marker='o', markersize=10, linewidth=3, color='#e63946')</text:span></text:span></text:p>
      <text:p text:style-name="P13"><text:span text:style-name="Source_20_Text"><text:s text:c="4"/></text:span><text:span text:style-name="Source_20_Text"><text:span text:style-name="T1">ax.fill_between(labels, f1_scores, 0.40, alpha=0.1, color='#e63946')</text:span></text:span></text:p>
      <text:p text:style-name="P14"><text:span text:style-name="Source_20_Text"><text:s text:c="4"/></text:span></text:p>
      <text:p text:style-name="P13"><text:span text:style-name="Source_20_Text"><text:s text:c="4"/></text:span><text:span text:style-name="Source_20_Text"><text:span text:style-name="T1">ax.set_ylim(0.48, 0.56)</text:span></text:span></text:p>
      <text:p text:style-name="P13"><text:span text:style-name="Source_20_Text"><text:s text:c="4"/></text:span><text:span text:style-name="Source_20_Text"><text:span text:style-name="T1">ax.set_ylabel('Macro F1 Score', fontweight='bold')</text:span></text:span></text:p>
      <text:p text:style-name="P13"><text:span text:style-name="Source_20_Text"><text:s text:c="4"/></text:span><text:span text:style-name="Source_20_Text"><text:span text:style-name="T1">ax.set_title('Figure 2: Impact of Attention Pooling Mechanisms', pad=20, fontweight='bold')</text:span></text:span></text:p>
      <text:p text:style-name="P14"><text:span text:style-name="Source_20_Text"><text:s text:c="4"/></text:span></text:p>
      <text:p text:style-name="P13"><text:span text:style-name="Source_20_Text"><text:s text:c="4"/></text:span><text:span text:style-name="Source_20_Text"><text:span text:style-name="T1">for i, txt in enumerate(f1_scores):</text:span></text:span></text:p>
      <text:p text:style-name="P13"><text:span text:style-name="Source_20_Text"><text:s text:c="8"/></text:span><text:span text:style-name="Source_20_Text"><text:span text:style-name="T1">ax.annotate(f'{txt:.4f}', (labels[i], f1_scores[i]), </text:span></text:span></text:p>
      <text:p text:style-name="P13"><text:span text:style-name="Source_20_Text"><text:s text:c="20"/></text:span><text:span text:style-name="Source_20_Text"><text:span text:style-name="T1">textcoords="offset points", xytext=(0,10), ha='center', fontweight='bold')</text:span></text:span></text:p>
      <text:p text:style-name="P14"><text:soft-page-break/><text:span text:style-name="Source_20_Text"><text:s text:c="8"/></text:span></text:p>
      <text:p text:style-name="P13"><text:span text:style-name="Source_20_Text"><text:s text:c="4"/></text:span><text:span text:style-name="Source_20_Text"><text:span text:style-name="T1">plt.grid(linestyle='--', alpha=0.7)</text:span></text:span></text:p>
      <text:p text:style-name="P14"><text:span text:style-name="Source_20_Text"><text:s text:c="4"/></text:span><text:span text:style-name="Source_20_Text"><text:span text:style-name="T1">plt.tight_layout()</text:span></text:span></text:p>
      <text:p text:style-name="P13"><text:span text:style-name="Source_20_Text"><text:s text:c="4"/></text:span><text:span text:style-name="Source_20_Text"><text:span text:style-name="T1">plt.savefig('fig2_pooling_mechanisms.png', dpi=300)</text:span></text:span></text:p>
      <text:p text:style-name="P14"><text:span text:style-name="Source_20_Text"><text:s text:c="4"/></text:span><text:span text:style-name="Source_20_Text"><text:span text:style-name="T1">plt.show()</text:span></text:span></text:p>
      <text:p text:style-name="P14"/>
      <text:p text:style-name="P13"><text:span text:style-name="Source_20_Text"><text:span text:style-name="T1"># ==========================================</text:span></text:span></text:p>
      <text:p text:style-name="P13"><text:span text:style-name="Source_20_Text"><text:span text:style-name="T1"># BIỂU ĐỒ 3: THE ULTIMATE COMBO (SOTA)</text:span></text:span></text:p>
      <text:p text:style-name="P13"><text:span text:style-name="Source_20_Text"><text:span text:style-name="T1"># ==========================================</text:span></text:span></text:p>
      <text:p text:style-name="P13"><text:span text:style-name="Source_20_Text"><text:span text:style-name="T1">def plot_ultimate_combo():</text:span></text:span></text:p>
      <text:p text:style-name="P13"><text:span text:style-name="Source_20_Text"><text:s text:c="4"/></text:span><text:span text:style-name="Source_20_Text"><text:span text:style-name="T1">configs = ['Baseline', 'FGA (MLP) Chỉ định', 'FGA + LA (Tau=1.0)\n[Proposed]']</text:span></text:span></text:p>
      <text:p text:style-name="P13"><text:span text:style-name="Source_20_Text"><text:s text:c="4"/></text:span><text:span text:style-name="Source_20_Text"><text:span text:style-name="T1">macro_f1 = [0.4900, 0.5439, 0.5413]</text:span></text:span></text:p>
      <text:p text:style-name="P13"><text:span text:style-name="Source_20_Text"><text:s text:c="4"/></text:span><text:span text:style-name="Source_20_Text"><text:span text:style-name="T1">ransomware_f1 = [0.3200, 0.3747, 0.3882] # 0.32 là điểm baseline ước tính</text:span></text:span></text:p>
      <text:p text:style-name="P14"><text:span text:style-name="Source_20_Text"><text:s text:c="4"/></text:span></text:p>
      <text:p text:style-name="P13"><text:span text:style-name="Source_20_Text"><text:s text:c="4"/></text:span><text:span text:style-name="Source_20_Text"><text:span text:style-name="T1">x = np.arange(len(configs))</text:span></text:span></text:p>
      <text:p text:style-name="P13"><text:span text:style-name="Source_20_Text"><text:s text:c="4"/></text:span><text:span text:style-name="Source_20_Text"><text:span text:style-name="T1">width = 0.35</text:span></text:span></text:p>
      <text:p text:style-name="P14"><text:span text:style-name="Source_20_Text"><text:s text:c="4"/></text:span></text:p>
      <text:p text:style-name="P13"><text:span text:style-name="Source_20_Text"><text:s text:c="4"/></text:span><text:span text:style-name="Source_20_Text"><text:span text:style-name="T1">fig, ax = plt.subplots(figsize=(9, 5.5))</text:span></text:span></text:p>
      <text:p text:style-name="P13"><text:span text:style-name="Source_20_Text"><text:s text:c="4"/></text:span><text:span text:style-name="Source_20_Text"><text:span text:style-name="T1">rects1 = ax.bar(x - width/2, macro_f1, width, label='Macro F1 (Overall)', color='#2a9d8f', edgecolor='black')</text:span></text:span></text:p>
      <text:p text:style-name="P13"><text:span text:style-name="Source_20_Text"><text:s text:c="4"/></text:span><text:span text:style-name="Source_20_Text"><text:span text:style-name="T1">rects2 = ax.bar(x + width/2, ransomware_f1, width, label='Ransomware F1 (Rare Class)', color='#f4a261', edgecolor='black')</text:span></text:span></text:p>
      <text:p text:style-name="P14"><text:span text:style-name="Source_20_Text"><text:s text:c="4"/></text:span></text:p>
      <text:p text:style-name="P13"><text:span text:style-name="Source_20_Text"><text:s text:c="4"/></text:span><text:span text:style-name="Source_20_Text"><text:span text:style-name="T1">ax.set_ylabel('F1 Score', fontweight='bold')</text:span></text:span></text:p>
      <text:p text:style-name="P13"><text:span text:style-name="Source_20_Text"><text:s text:c="4"/></text:span><text:span text:style-name="Source_20_Text"><text:span text:style-name="T1">ax.set_title('Figure 3: Ultimate Combo Synergy (Overall vs. Rare Class)', pad=20, fontweight='bold')</text:span></text:span></text:p>
      <text:p text:style-name="P14"><text:span text:style-name="Source_20_Text"><text:s text:c="4"/></text:span><text:span text:style-name="Source_20_Text"><text:span text:style-name="T1">ax.set_xticks(x)</text:span></text:span></text:p>
      <text:p text:style-name="P13"><text:span text:style-name="Source_20_Text"><text:s text:c="4"/></text:span><text:span text:style-name="Source_20_Text"><text:span text:style-name="T1">ax.set_xticklabels(configs, fontweight='bold')</text:span></text:span></text:p>
      <text:p text:style-name="P13"><text:span text:style-name="Source_20_Text"><text:s text:c="4"/></text:span><text:span text:style-name="Source_20_Text"><text:span text:style-name="T1">ax.legend(loc='upper left')</text:span></text:span></text:p>
      <text:p text:style-name="P14"><text:span text:style-name="Source_20_Text"><text:s text:c="4"/></text:span></text:p>
      <text:p text:style-name="P13"><text:span text:style-name="Source_20_Text"><text:s text:c="4"/></text:span><text:span text:style-name="Source_20_Text"><text:span text:style-name="T1">def autolabel(rects):</text:span></text:span></text:p>
      <text:p text:style-name="P13"><text:span text:style-name="Source_20_Text"><text:s text:c="8"/></text:span><text:span text:style-name="Source_20_Text"><text:span text:style-name="T1">for rect in rects:</text:span></text:span></text:p>
      <text:p text:style-name="P14"><text:span text:style-name="Source_20_Text"><text:s text:c="12"/></text:span><text:span text:style-name="Source_20_Text"><text:span text:style-name="T1">height = rect.get_height()</text:span></text:span></text:p>
      <text:p text:style-name="P13"><text:span text:style-name="Source_20_Text"><text:s text:c="12"/></text:span><text:span text:style-name="Source_20_Text"><text:span text:style-name="T1">ax.annotate(f'{height:.4f}',</text:span></text:span></text:p>
      <text:p text:style-name="P13"><text:span text:style-name="Source_20_Text"><text:s text:c="24"/></text:span><text:span text:style-name="Source_20_Text"><text:span text:style-name="T1">xy=(rect.get_x() + rect.get_width() / 2, height),</text:span></text:span></text:p>
      <text:p text:style-name="P13"><text:span text:style-name="Source_20_Text"><text:s text:c="24"/></text:span><text:span text:style-name="Source_20_Text"><text:span text:style-name="T1">xytext=(0, 3), textcoords="offset points",</text:span></text:span></text:p>
      <text:p text:style-name="P13"><text:span text:style-name="Source_20_Text"><text:s text:c="24"/></text:span><text:span text:style-name="Source_20_Text"><text:span text:style-name="T1">ha='center', va='bottom', fontsize=10)</text:span></text:span></text:p>
      <text:p text:style-name="P14"><text:span text:style-name="Source_20_Text"><text:s text:c="12"/></text:span></text:p>
      <text:p text:style-name="P14"><text:span text:style-name="Source_20_Text"><text:s text:c="4"/></text:span><text:span text:style-name="Source_20_Text"><text:span text:style-name="T1">autolabel(rects1)</text:span></text:span></text:p>
      <text:p text:style-name="P14"><text:span text:style-name="Source_20_Text"><text:s text:c="4"/></text:span><text:span text:style-name="Source_20_Text"><text:span text:style-name="T1">autolabel(rects2)</text:span></text:span></text:p>
      <text:p text:style-name="P14"><text:span text:style-name="Source_20_Text"><text:s text:c="4"/></text:span></text:p>
      <text:p text:style-name="P13"><text:span text:style-name="Source_20_Text"><text:s text:c="4"/></text:span><text:span text:style-name="Source_20_Text"><text:span text:style-name="T1">plt.ylim(0.25, 0.60)</text:span></text:span></text:p>
      <text:p text:style-name="P13"><text:span text:style-name="Source_20_Text"><text:s text:c="4"/></text:span><text:span text:style-name="Source_20_Text"><text:span text:style-name="T1">plt.grid(axis='y', linestyle='--', alpha=0.7)</text:span></text:span></text:p>
      <text:p text:style-name="P14"><text:span text:style-name="Source_20_Text"><text:s text:c="4"/></text:span><text:span text:style-name="Source_20_Text"><text:span text:style-name="T1">plt.tight_layout()</text:span></text:span></text:p>
      <text:p text:style-name="P13"><text:span text:style-name="Source_20_Text"><text:s text:c="4"/></text:span><text:span text:style-name="Source_20_Text"><text:span text:style-name="T1">plt.savefig('fig3_ultimate_combo.png', dpi=300)</text:span></text:span></text:p>
      <text:p text:style-name="P14"><text:span text:style-name="Source_20_Text"><text:s text:c="4"/></text:span><text:span text:style-name="Source_20_Text"><text:span text:style-name="T1">plt.show()</text:span></text:span></text:p>
      <text:p text:style-name="P14"/>
      <text:p text:style-name="P13"><text:span text:style-name="Source_20_Text"><text:span text:style-name="T1"># Chạy cả 3 hàm để tạo ảnh</text:span></text:span></text:p>
      <text:p text:style-name="P14"><text:span text:style-name="Source_20_Text"><text:span text:style-name="T1">plot_semantic_vs_stats()</text:span></text:span></text:p>
      <text:p text:style-name="P14"><text:soft-page-break/><text:span text:style-name="Source_20_Text"><text:span text:style-name="T1">plot_pooling_mechanisms()</text:span></text:span></text:p>
      <text:p text:style-name="P14"><text:span text:style-name="Source_20_Text"><text:span text:style-name="T1">plot_ultimate_combo()</text:span></text:span></text:p>
      <text:p text:style-name="P1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oft-page-break/><text:span text:style-name="T1"/></text:p>
      <text:p text:style-name="P45"><text:span text:style-name="T1"/></text:p>
      <text:p text:style-name="P45"><text:span text:style-name="T1"/></text:p>
      <text:p text:style-name="Standard"/>
      <text:p text:style-name="Standard"/>
      <text:p text:style-name="Standard"/>
      <text:h text:style-name="Heading_20_3" text:outline-level="3"><text:span text:style-name="T6">Phần 2: Các phương pháp Grouping khác (Để đối đáp &amp; Đưa vào Future Work)</text:span></text:h>
      <text:p text:style-name="P25">Ông đã làm <text:span text:style-name="T4">Semantic Grouping (Ngữ nghĩa con người)</text:span> và <text:span text:style-name="T4">Statistical Grouping (Thống kê Toán học - Best)</text:span>. Nếu thầy cô hỏi: <text:span text:style-name="T5">"Ngoài 2 cách này, nếu có thêm thời gian em sẽ thử cách nào nữa?"</text:span> Hãy đưa ra 3 phương pháp từ truyền thống đến "hạng nặng" sau đây:</text:p>
      <text:p text:style-name="P20">Cách 1: Nhóm bằng Học máy không giám sát (Clustering / Correlation FGA)</text:p>
      <text:list text:style-name="L20">
        <text:list-item>
          <text:p text:style-name="P33"><text:span text:style-name="T4">Cách làm:</text:span> Thay vì dùng luật (If-Else) như hiện tại, ta tính <text:span text:style-name="T4">Ma trận tương quan (Correlation Matrix)</text:span> của cả 50 cột. Hoặc dùng thuật toán K-Means / Hierarchical Clustering trực tiếp trên vector đặc trưng.</text:p>
        </text:list-item>
        <text:list-item>
          <text:p text:style-name="P33"><text:span text:style-name="T4">Nguyên lý:</text:span> Các cột nào có độ tương quan $&gt; 0.85$, hoặc khoảng cách Euclidean gần nhau, máy sẽ tự động gom chúng vào chung 1 nhóm.</text:p>
        </text:list-item>
        <text:list-item>
          <text:p text:style-name="P33"><text:span text:style-name="T4">Ưu điểm:</text:span> Khách quan 100% dựa trên thuật toán, tìm ra được những liên kết ngầm mà thống kê bình thường không thấy.</text:p>
        </text:list-item>
      </text:list>
      <text:p text:style-name="P20">Cách 2: Nhóm theo độ quan trọng (Feature Importance / Tree-based Routing)</text:p>
      <text:list text:style-name="L21">
        <text:list-item>
          <text:p text:style-name="P34"><text:span text:style-name="T4">Cách làm:</text:span> Đầu tiên, train một mô hình LightGBM hoặc XGBoost trên dữ liệu. Trích xuất điểm <text:span text:style-name="T4">SHAP values</text:span> hoặc <text:span text:style-name="T4">Feature Importance</text:span>. Sau đó chia nhóm theo "đẳng cấp":</text:p>
          <text:list>
            <text:list-item>
              <text:p text:style-name="P34">Nhóm 1: Top 10 cột quan trọng nhất (VIP).</text:p>
            </text:list-item>
            <text:list-item>
              <text:p text:style-name="P34">Nhóm 2: Các cột quan trọng tầm trung.</text:p>
            </text:list-item>
            <text:list-item>
              <text:p text:style-name="P34">Nhóm 3: Các cột ít quan trọng (đáy xã hội).</text:p>
            </text:list-item>
          </text:list>
        </text:list-item>
        <text:list-item>
          <text:p text:style-name="P34"><text:span text:style-name="T4">Nguyên lý:</text:span> Ép các tính năng quan trọng vào chung một Token để Transformer dễ tập trung (Attention) vào Token "VIP" đó.</text:p>
        </text:list-item>
      </text:list>
      <text:p text:style-name="P20">Cách 3: Nhóm động học (Learnable/Soft Grouping) - Cấp độ Tiến sĩ</text:p>
      <text:list text:style-name="L22">
        <text:list-item>
          <text:p text:style-name="P35"><text:span text:style-name="T4">Cách làm:</text:span> Đây là cách "bá đạo" nhất. Thay vì phải chia nhóm "cứng" (Hard-coding) bằng Python ở file tiền xử lý rồi mới đưa vào Model. Ta đưa thẳng 50 <text:soft-page-break/>cột vào Model, sau đó xây một lớp <text:span text:style-name="T4">Routing Network (như cơ chế Mixture of Experts - MoE)</text:span>.</text:p>
        </text:list-item>
        <text:list-item>
          <text:p text:style-name="P35"><text:span text:style-name="T4">Nguyên lý:</text:span> Trong quá trình huấn luyện, Backpropagation (Lan truyền ngược) sẽ tự động tối ưu hóa và quyết định xem cột nào nên đi vào nhóm nào (Soft Assignment). Với một mẫu Benign, cột A có thể chui vào Nhóm 1; nhưng với mẫu Ransomware, cột A lại tự động chui vào Nhóm 2. Phân nhóm thay đổi linh hoạt theo từng dòng dữ liệu.</text:p>
        </text:list-item>
      </text:list>
      <text:p text:style-name="Standard"/>
      <text:p text:style-name="Standard"/>
      <text:p text:style-name="Standard"/>
      <text:p text:style-name="Standard"/>
      <text:p text:style-name="Standard"/>
      <text:h text:style-name="P4" text:outline-level="1"><text:span text:style-name="T6">PHẦN 1: TỔ HỢP KIẾN TRÚC MÔ HÌNH (</text:span><text:span text:style-name="Source_20_Text"><text:span text:style-name="T1">model.py</text:span></text:span><text:span text:style-name="T6">)</text:span></text:h>
      <text:p text:style-name="P44"><text:span text:style-name="T1">Dữ liệu đầu vào (Input </text:span><text:span text:style-name="Source_20_Text"><text:span text:style-name="T1">x</text:span></text:span><text:span text:style-name="T1">) vào hàm </text:span><text:span text:style-name="Source_20_Text"><text:span text:style-name="T1">forward</text:span></text:span><text:span text:style-name="T1"> lúc này là 1 </text:span><text:span text:style-name="T2">Batch</text:span><text:span text:style-name="T1"> (Lô dữ liệu).</text:span></text:p>
      <text:list text:style-name="L27">
        <text:list-item>
          <text:p text:style-name="P63"><text:span text:style-name="T1">Hình dáng Tensor ban đầu: </text:span><text:span text:style-name="Source_20_Text"><text:span text:style-name="T1">[Batch_size, Total_features]</text:span></text:span><text:span text:style-name="T1">. Ví dụ: </text:span><text:span text:style-name="Source_20_Text"><text:span text:style-name="T1">[256, 50]</text:span></text:span><text:span text:style-name="T1"> (256 mẫu mã độc, mỗi mẫu có 50 cột đặc trưng).</text:span></text:p>
        </text:list-item>
      </text:list>
      <text:h text:style-name="P9" text:outline-level="3"><text:span text:style-name="T6">1. Class </text:span><text:span text:style-name="Source_20_Text"><text:span text:style-name="T1">SinCosTokenizer</text:span></text:span><text:span text:style-name="T6">: Biến con số thành Sự hiểu biết</text:span></text:h>
      <text:p text:style-name="P25"><text:span text:style-name="T4">Bản chất:</text:span> Mạng Nơ-ron rất ghét các con số thô (raw numbers) vì chúng vô tri và khó tìm ra quy luật phi tuyến. Trong xử lý ngôn ngữ (NLP), ta có Tokenizer biến chữ thành Vector. Ở đây, ông đang xây dựng một Numeric Tokenizer.</text:p>
      <text:list text:style-name="L28">
        <text:list-item>
          <text:p text:style-name="P64"><text:span text:style-name="Source_20_Text"><text:span text:style-name="T1">self.frequencies = nn.Parameter(...)</text:span></text:span><text:span text:style-name="T1">: Khởi tạo ngẫu nhiên một bộ tần số.</text:span></text:p>
        </text:list-item>
        <text:list-item>
          <text:p text:style-name="P64"><text:span text:style-name="Source_20_Text"><text:span text:style-name="T1">angles = 2 * math.pi * x * self.frequencies</text:span></text:span><text:span text:style-name="T1">: Dùng công thức lượng giác (vòng tròn lượng giác) nhân giá trị của cột với tần số. Nếu giá trị thay đổi nhỏ, góc quay sẽ khác nhau, giúp phóng to sự khác biệt của dữ liệu.</text:span></text:p>
        </text:list-item>
        <text:list-item>
          <text:p text:style-name="P64"><text:span text:style-name="Source_20_Text"><text:span text:style-name="T1">torch.cat([sin, cos], dim=-1)</text:span></text:span><text:span text:style-name="T1">: Nối giá trị sin và cos lại. Tạo ra tính chu kỳ liên tục.</text:span></text:p>
        </text:list-item>
        <text:list-item>
          <text:p text:style-name="P64"><text:span text:style-name="Source_20_Text"><text:span text:style-name="T1">self.mlp(emb)</text:span></text:span><text:span text:style-name="T1">: Mạng Linear bóp ma trận sin/cos này về đúng kích thước </text:span><text:span text:style-name="Source_20_Text"><text:span text:style-name="T1">d_model</text:span></text:span><text:span text:style-name="T1"> (128 chiều).</text:span></text:p>
        </text:list-item>
        <text:list-item>
          <text:p text:style-name="P64"><text:span text:style-name="T2">Đặc biệt lưu ý - </text:span><text:span text:style-name="Source_20_Text"><text:span text:style-name="T2">self.column_embeddings</text:span></text:span><text:span text:style-name="T2">:</text:span><text:span text:style-name="T1"> Đây là linh hồn của Tokenizer! Nó cộng thêm một mã định danh ngẫu nhiên (được tự động học) vào vector của từng cột. Nó giống như </text:span><text:span text:style-name="T2">Positional Encoding</text:span><text:span text:style-name="T1"> trong Transformer, giúp mô hình phân biệt được: </text:span><text:span text:style-name="T3">"Vector này là của cột A, Vector kia là của cột B"</text:span><text:span text:style-name="T1"> dù giá trị con số của chúng có giống hệt nhau.</text:span></text:p>
        </text:list-item>
      </text:list>
      <text:h text:style-name="P9" text:outline-level="3"><text:soft-page-break/><text:span text:style-name="T6">2. Class </text:span><text:span text:style-name="Source_20_Text"><text:span text:style-name="T1">UltimateHybridModel</text:span></text:span><text:span text:style-name="T6">: Trục xương sống</text:span></text:h>
      <text:h text:style-name="P10" text:outline-level="4">A. Khởi tạo (Init)</text:h>
      <text:list text:style-name="L29">
        <text:list-item>
          <text:p text:style-name="P65"><text:span text:style-name="Source_20_Text"><text:span text:style-name="T1">self.tokenizers</text:span></text:span><text:span text:style-name="T1"> &amp; </text:span><text:span text:style-name="Source_20_Text"><text:span text:style-name="T1">self.norms</text:span></text:span><text:span text:style-name="T1">: Tạo ra các bộ mã hóa và bộ chuẩn hóa (</text:span><text:span text:style-name="Source_20_Text"><text:span text:style-name="T1">LayerNorm</text:span></text:span><text:span text:style-name="T1">) </text:span><text:span text:style-name="T2">độc lập cho từng nhóm</text:span><text:span text:style-name="T1">. Cực kỳ thông minh vì mỗi nhóm thống kê (Group) có phân phối khác nhau, không thể dùng chung 1 cái cân được.</text:span></text:p>
        </text:list-item>
        <text:list-item>
          <text:p text:style-name="P65"><text:span text:style-name="Source_20_Text"><text:span text:style-name="T1">self.attn_pools</text:span></text:span><text:span text:style-name="T1">: Mạng Multi-Layer Perceptron (MLP) nhỏ để làm bộ lọc nhiễu cho từng nhóm.</text:span></text:p>
        </text:list-item>
        <text:list-item>
          <text:p text:style-name="P65"><text:span text:style-name="Source_20_Text"><text:span text:style-name="T1">self.transformer</text:span></text:span><text:span text:style-name="T1">: Mạng Transformer truyền thống với cơ chế Self-Attention.</text:span></text:p>
        </text:list-item>
      </text:list>
      <text:h text:style-name="P11" text:outline-level="4"><text:span text:style-name="T6">B. Luồng dữ liệu (Hàm </text:span><text:span text:style-name="Source_20_Text"><text:span text:style-name="T1">forward</text:span></text:span><text:span text:style-name="T6">) - 5 Bước cốt lõi</text:span></text:h>
      <text:p text:style-name="P20">Bước 1: Cắt dữ liệu (Feature Splitting)</text:p>
      <text:list text:style-name="L30">
        <text:list-item>
          <text:p text:style-name="P66"><text:span text:style-name="Source_20_Text"><text:span text:style-name="T1">x_splits = torch.split(x, self.group_counts, dim=1)</text:span></text:span></text:p>
        </text:list-item>
        <text:list-item>
          <text:p text:style-name="P66"><text:span text:style-name="T1">Cầm con dao cắt ma trận </text:span><text:span text:style-name="Source_20_Text"><text:span text:style-name="T1">[256, 50]</text:span></text:span><text:span text:style-name="T1"> dọc theo các cột, chia thành các tensor nhỏ dựa trên số lượng cột của từng nhóm. Ví dụ cắt ra nhóm </text:span><text:span text:style-name="Source_20_Text"><text:span text:style-name="T1">[256, 4]</text:span></text:span><text:span text:style-name="T1">, nhóm </text:span><text:span text:style-name="Source_20_Text"><text:span text:style-name="T1">[256, 12]</text:span></text:span><text:span text:style-name="T1">, v.v.</text:span></text:p>
        </text:list-item>
      </text:list>
      <text:p text:style-name="P20">Bước 2: Vòng lặp Nhúng &amp; Lọc nhiễu (Bí mật sức mạnh của FGA)</text:p>
      <text:p text:style-name="P25">Đoạn code này duyệt qua từng nhóm vừa cắt:</text:p>
      <text:list text:style-name="L31">
        <text:list-item>
          <text:p text:style-name="P67"><text:span text:style-name="Source_20_Text"><text:span text:style-name="T1">toks = self.norms[i](self.tokenizers[i](x_splits[i]))</text:span></text:span><text:span text:style-name="T1">: Từng nhóm đi qua Tokenizer riêng. Ví dụ nhóm 4 cột sẽ phình to ra thành </text:span><text:span text:style-name="Source_20_Text"><text:span text:style-name="T1">[256, 4, 128]</text:span></text:span><text:span text:style-name="T1">. </text:span><text:span text:style-name="Source_20_Text"><text:span text:style-name="T1">LayerNorm</text:span></text:span><text:span text:style-name="T1"> giúp ổn định phương sai để train không bị lỗi.</text:span></text:p>
        </text:list-item>
        <text:list-item>
          <text:p text:style-name="P67"><text:span text:style-name="Source_20_Text"><text:span text:style-name="T1">weights = self.attn_pools[i](toks)</text:span></text:span><text:span text:style-name="T1">: Đưa 4 vector này qua mạng MLP. Hàm </text:span><text:span text:style-name="Source_20_Text"><text:span text:style-name="T1">Softmax</text:span></text:span><text:span text:style-name="T1"> ở lớp cuối sẽ tính ra </text:span><text:span text:style-name="T2">Trọng số quan trọng (Attention Weights)</text:span><text:span text:style-name="T1"> từ 0.0 đến 1.0 cho từng cột. Cột nào chứa tín hiệu mã độc mạnh sẽ có điểm cao, cột nhiễu sẽ bị ép về gần 0.</text:span></text:p>
        </text:list-item>
        <text:list-item>
          <text:p text:style-name="P67"><text:span text:style-name="Source_20_Text"><text:span text:style-name="T1">pooled_token = (toks * weights).sum(dim=1, keepdim=True)</text:span></text:span><text:span text:style-name="T1">: Nhờ phép nhân với trọng số và tính tổng (Weighted Sum), toàn bộ 4 cột trong nhóm bị nén lại thành </text:span><text:span text:style-name="T2">1 Vector Đại Diện duy nhất</text:span><text:span text:style-name="T1"> </text:span><text:span text:style-name="Source_20_Text"><text:span text:style-name="T1">[256, 1, 128]</text:span></text:span><text:span text:style-name="T1">. Thao tác này gọi là Information Bottleneck (Thắt cổ chai thông tin) giúp lọc sạch rác.</text:span></text:p>
        </text:list-item>
      </text:list>
      <text:p text:style-name="P20">Bước 3: Ghép đại diện</text:p>
      <text:list text:style-name="L32">
        <text:list-item>
          <text:p text:style-name="P68"><text:span text:style-name="Source_20_Text"><text:span text:style-name="T1">tokens = torch.cat(group_tokens, dim=1)</text:span></text:span><text:span text:style-name="T1">: Ghép tất cả các đại diện nhóm lại. Ví dụ có 23 nhóm, ta sẽ có một chuỗi Tensor sạch sẽ: </text:span><text:span text:style-name="Source_20_Text"><text:span text:style-name="T1">[256, 23, 128]</text:span></text:span><text:span text:style-name="T1">.</text:span></text:p>
        </text:list-item>
      </text:list>
      <text:p text:style-name="P20">Bước 4: CLS Token và Transformer</text:p>
      <text:list text:style-name="L33">
        <text:list-item>
          <text:p text:style-name="P69"><text:soft-page-break/><text:span text:style-name="Source_20_Text"><text:span text:style-name="T1">cls = self.cls_token.expand(...)</text:span></text:span><text:span text:style-name="T1">: Nhét cái CLS token (Token phân loại ảo) lên đầu chuỗi. Chuỗi dài thành 24 </text:span><text:span text:style-name="Source_20_Text"><text:span text:style-name="T1">[256, 24, 128]</text:span></text:span><text:span text:style-name="T1">.</text:span></text:p>
        </text:list-item>
        <text:list-item>
          <text:p text:style-name="P69"><text:span text:style-name="T3">Lưu ý nhỏ:</text:span><text:span text:style-name="T1"> Ông đang dùng </text:span><text:span text:style-name="Source_20_Text"><text:span text:style-name="T1">torch.zeros</text:span></text:span><text:span text:style-name="T1"> cho CLS Token. Đi bảo vệ nếu bị hỏi, hãy nói "Để mô hình dễ hội tụ hơn, bản lý tưởng em sẽ dùng </text:span><text:span text:style-name="Source_20_Text"><text:span text:style-name="T1">trunc_normal_</text:span></text:span><text:span text:style-name="T1"> để khởi tạo ngẫu nhiên bẻ gãy tính đối xứng".</text:span></text:p>
        </text:list-item>
        <text:list-item>
          <text:p text:style-name="P69"><text:span text:style-name="Source_20_Text"><text:span text:style-name="T1">x_trans = self.transformer(x_trans)</text:span></text:span><text:span text:style-name="T1">: Đẩy chuỗi 24 Tokens này qua Transformer. Tại đây, CLS token sẽ đi "thu thập" và liên kết các thông tin chéo giữa 23 nhóm đại diện lại với nhau.</text:span></text:p>
        </text:list-item>
      </text:list>
      <text:p text:style-name="P20">Bước 5: Xuất kết quả (The Head)</text:p>
      <text:list text:style-name="L34">
        <text:list-item>
          <text:p text:style-name="P70"><text:span text:style-name="Source_20_Text"><text:span text:style-name="T1">self.head(x_trans[:, 0])</text:span></text:span><text:span text:style-name="T1">: Chỉ bóc đúng vị trí số 0 (chính là CLS Token lúc này đã chứa đầy đủ trí tuệ của toàn bộ mẫu dữ liệu). Đưa qua mạng </text:span><text:span text:style-name="Source_20_Text"><text:span text:style-name="T1">Linear</text:span></text:span><text:span text:style-name="T1"> để ánh xạ từ 128 chiều xuống số lượng nhãn (ví dụ 10 lớp mã độc). Output cuối cùng là </text:span><text:span text:style-name="Source_20_Text"><text:span text:style-name="T1">[256, 10]</text:span></text:span><text:span text:style-name="T1">.</text:span></text:p>
        </text:list-item>
      </text:list>
      <text:p text:style-name="Horizontal_20_Line"/>
      <text:h text:style-name="P4" text:outline-level="1"><text:span text:style-name="T6">PHẦN 2: ĐỘNG CƠ HUẤN LUYỆN (</text:span><text:span text:style-name="Source_20_Text"><text:span text:style-name="T1">engine.py</text:span></text:span><text:span text:style-name="T6">)</text:span></text:h>
      <text:p text:style-name="P25">Phần này chứa vũ khí hạng nặng giúp mô hình của ông chiến thắng được bộ dữ liệu mất cân bằng (Imbalanced Dataset).</text:p>
      <text:h text:style-name="P9" text:outline-level="3"><text:span text:style-name="T6">1. Class </text:span><text:span text:style-name="Source_20_Text"><text:span text:style-name="T1">LogitAdjustedLoss</text:span></text:span><text:span text:style-name="T6"> (Siêu phẩm chống mất cân bằng)</text:span></text:h>
      <text:p text:style-name="P25"><text:span text:style-name="T4">Bản chất:</text:span> Thông thường, class nào có nhiều data (Majority) mô hình sẽ ưu tiên đoán class đó để tối ưu Loss nhanh nhất. Điều này làm các họ mã độc hiếm (như Ransomware-Pysa) bị bỏ qua.</text:p>
      <text:p text:style-name="P25">Phương pháp cũ là dùng Class Weights (nhân trọng số). Phương pháp hiện đại nhất của ông là <text:span text:style-name="T4">Logit Adjusted Loss (LA)</text:span>.</text:p>
      <text:list text:style-name="L35">
        <text:list-item>
          <text:p text:style-name="P71"><text:span text:style-name="Source_20_Text"><text:span text:style-name="T1">self.adjustments = tau * torch.log(class_priors + 1e-9)</text:span></text:span><text:span text:style-name="T1">: Công thức vàng. Nó tính ra một lượng "hình phạt" (penalty) có giá trị âm. Class nào càng chiếm tỷ lệ lớn (</text:span><text:span text:style-name="Source_20_Text"><text:span text:style-name="T1">class_priors</text:span></text:span><text:span text:style-name="T1"> cao), thì giá trị logarit càng nhỏ, hình phạt càng nặng.</text:span></text:p>
        </text:list-item>
        <text:list-item>
          <text:p text:style-name="P71"><text:span text:style-name="Source_20_Text"><text:span text:style-name="T1">return F.cross_entropy(logits + adj, labels)</text:span></text:span><text:span text:style-name="T1">: Trước khi tính Loss, hàm này lấy Logits gốc (điểm số dự đoán thô) </text:span><text:span text:style-name="T2">CỘNG</text:span><text:span text:style-name="T1"> với cái </text:span><text:span text:style-name="Source_20_Text"><text:span text:style-name="T1">adj</text:span></text:span><text:span text:style-name="T1"> (hình phạt).</text:span></text:p>
        </text:list-item>
        <text:list-item>
          <text:p text:style-name="P36"><text:span text:style-name="T4">Tác dụng:</text:span> Nó chủ động "dìm hàng" điểm số của các class đa số xuống. Bắt buộc mô hình phải cố gắng cày cuốc, học các đặc trưng của class thiểu số để <text:soft-page-break/>bù lại điểm số. Kết quả: Mô hình công bằng với tất cả các họ mã độc mà không cần phải Oversampling (sinh thêm dữ liệu giả).</text:p>
        </text:list-item>
      </text:list>
      <text:p text:style-name="P44"><text:span text:style-name="T1">Để ông có thể tự tay thử nghiệm xem </text:span><text:span text:style-name="Source_20_Text"><text:span text:style-name="T1">Logit Adjusted Loss</text:span></text:span><text:span text:style-name="T1"> "dìm hàng" các class đa số như thế nào trước khi vào lớp CrossEntropy, tui đã làm sẵn một bảng mô phỏng tương tác bên dưới. Ông có thể kéo thanh trượt để hiểu sâu sắc công thức toán học này:</text:span></text:p>
      <text:h text:style-name="P9" text:outline-level="3"><text:span text:style-name="T6">2. Hàm </text:span><text:span text:style-name="Source_20_Text"><text:span text:style-name="T1">train_one_epoch</text:span></text:span><text:span text:style-name="T6"> &amp; Cơ chế bảo vệ Gradient</text:span></text:h>
      <text:list text:style-name="L36">
        <text:list-item>
          <text:p text:style-name="P72"><text:span text:style-name="Source_20_Text"><text:span text:style-name="T1">torch.nn.utils.clip_grad_norm_(model.parameters(), 1.0)</text:span></text:span><text:span text:style-name="T1">: Dòng này trông nhỏ nhưng CỨU SỐNG cả mô hình. Trong kiến trúc có Transformer và Attention, đạo hàm (Gradients) có những lúc bị nhân lên quá to (Exploding Gradients). Dòng này gọt bớt các gradient vượt quá ngưỡng 1.0, giúp mô hình cập nhật trọng số êm ái, Loss không bị nhảy vọt thành </text:span><text:span text:style-name="Source_20_Text"><text:span text:style-name="T1">NaN</text:span></text:span><text:span text:style-name="T1"> (Not a Number).</text:span></text:p>
        </text:list-item>
      </text:list>
      <text:h text:style-name="P9" text:outline-level="3"><text:span text:style-name="T6">3. Hàm </text:span><text:span text:style-name="Source_20_Text"><text:span text:style-name="T1">evaluate</text:span></text:span><text:span text:style-name="T6"> &amp; Tại sao dùng </text:span><text:span text:style-name="Source_20_Text"><text:span text:style-name="T1">average='macro'</text:span></text:span></text:h>
      <text:list text:style-name="L37">
        <text:list-item>
          <text:p text:style-name="P73"><text:span text:style-name="Source_20_Text"><text:span text:style-name="T1">f1_score(..., average='macro', zero_division=0)</text:span></text:span><text:span text:style-name="T1">: Trong bài toán phân loại mã độc mất cân bằng, nếu dùng Accuracy (Độ chính xác tổng), mô hình chỉ cần đoán bừa class đa số cũng được 90% điểm $\rightarrow$ Lừa dối!</text:span></text:p>
        </text:list-item>
        <text:list-item>
          <text:p text:style-name="P37">Metric <text:span text:style-name="T4">Macro F1</text:span> sẽ tính F1-score riêng lẻ cho từng họ mã độc (dù họ đó có 1000 mẫu hay 10 mẫu), sau đó mới cộng lại chia trung bình đều. Điểm này phản ánh sức mạnh ĐÍCH THỰC của mô hình trên từng ngóc ngách của dữ liệu.</text:p>
        </text:list-item>
      </text:list>
      <text:p text:style-name="Horizontal_20_Line"/>
      <text:p text:style-name="P20">TÓM LẠI - QUY TRÌNH "KỂ CHUYỆN" KHI TRÌNH BÀY CHO HỘI ĐỒNG:</text:p>
      <text:list text:style-name="L38">
        <text:list-item>
          <text:p text:style-name="P38">Dữ liệu vào là 1 khối. Em chém khối đó ra làm 23 nhóm (dựa trên nhóm thống kê đã tiền xử lý).</text:p>
        </text:list-item>
        <text:list-item>
          <text:p text:style-name="P38">Từng nhóm đi vào Tokenizer Toán học để biến số thành Vector biểu diễn.</text:p>
        </text:list-item>
        <text:list-item>
          <text:p text:style-name="P38">Trong mỗi nhóm, các tính năng đánh nhau (Attention Pooling). Kẻ nhiễu bị diệt, kẻ tinh hoa được giữ lại $\rightarrow$ Nhóm 12 cột bị ép thành 1 Token.</text:p>
        </text:list-item>
        <text:list-item>
          <text:p text:style-name="P38">Gắn cờ Tướng (CLS Token) lên đầu, cho tất cả 24 Token đó đi vào Transformer để chúng tìm hiểu tương quan chéo.</text:p>
        </text:list-item>
        <text:list-item>
          <text:p text:style-name="P38">Cờ Tướng (CLS) ra khỏi Transformer mang theo quyết định cuối cùng, đưa qua Head để ra điểm số.</text:p>
        </text:list-item>
        <text:list-item>
          <text:p text:style-name="P38">Khi tính lỗi, em dùng Logit Adjusted Loss để chủ động trừ điểm các class đông dân, bảo vệ các mã độc hiếm.</text:p>
        </text:list-item>
      </text:list>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22:33:19.211163166</meta:creation-date>
    <dc:date>2026-05-09T19:55:50.278182328</dc:date>
    <meta:editing-duration>P1DT6H40M40S</meta:editing-duration>
    <meta:editing-cycles>1</meta:editing-cycles>
    <meta:document-statistic meta:table-count="4" meta:image-count="0" meta:object-count="0" meta:page-count="24" meta:paragraph-count="418" meta:word-count="6598" meta:character-count="36188" meta:non-whitespace-character-count="29706"/>
    <meta:generator>LibreOffice/24.2.7.2$Linux_X86_64 LibreOffice_project/420$Build-2</meta:generator>
  </office:meta>
</office:document-meta>
</file>